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left="1.27cm" fo:margin-right="1.27cm" fo:margin-top="0.282cm" fo:margin-bottom="0.282cm" style:contextual-spacing="false" fo:line-height="150%"/>
    </style:style>
    <style:style style:name="P4" style:family="paragraph" style:parent-style-name="Standard">
      <style:paragraph-properties fo:margin-top="0cm" fo:margin-bottom="0.282cm" style:contextual-spacing="false" fo:line-height="150%"/>
      <style:text-properties officeooo:paragraph-rsid="001a72a3"/>
    </style:style>
    <style:style style:name="P5" style:family="paragraph" style:parent-style-name="Standard">
      <style:paragraph-properties fo:margin-top="0cm" fo:margin-bottom="0.282cm" style:contextual-spacing="false" fo:line-height="150%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officeooo:rsid="001a72a3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style:font-name="Times New Roman" fo:font-size="12pt" officeooo:rsid="001d0a9d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6f49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70bcf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act: </text:span><text:span text:style-name="T2">Michael Needham (ChefMyKLove)</text:span></text:p>
      <text:p text:style-name="P1"><text:span text:style-name="T1">Email: </text:span><text:span text:style-name="T2">chefmyklove@gmail.com</text:span></text:p>
      <text:p text:style-name="P1"><text:span text:style-name="T1">Web: </text:span><text:span text:style-name="T2">naked.chefmyklove.com</text:span></text:p>
      <text:p text:style-name="P1"><text:span text:style-name="T1">Interview: </text:span><text:span text:style-name="T2">Available on request</text:span></text:p>
      <text:p text:style-name="P2"/>
      <text:p text:style-name="P1"><text:span text:style-name="T3">FOR IMMEDIATE RELEASE</text:span></text:p>
      <text:p text:style-name="P1"><text:span text:style-name="T1">EMBARGOED UNTIL MAY 26, 2026 — 9:00 AM PDT</text:span></text:p>
      <text:p text:style-name="P2"/>
      <text:p text:style-name="P1"><text:span text:style-name="T1">Debut Short Story We're Naked! — Lyrical, Surreal, Formally Inventive — Publishes Today Across Four Editions</text:span></text:p>
      <text:p text:style-name="P2"/>
      <text:p text:style-name="P1"><text:span text:style-name="T2">NANAIMO, BC, May 26, 2026 — Michael Needham, a multidisciplinary artist and writer based in Nanaimo, British Columbia, publishing under the pen name ChefMyKLove, publishes We're Naked! — A Rapture in Three Acts today — a debut short story that operates simultaneously as lyrical literary fiction and a formally inventive publishing experiment.</text:span></text:p>
      <text:p text:style-name="P1"><text:span text:style-name="T2">The story is told in three acts: a morning waking in which two people reach for each other as the day opens up; a dream narrated to a companion, set at an apocalypse party in Central Park where </text:span><text:span text:style-name="T4">it’s the end of the world and </text:span><text:span text:style-name="T2">no one panics; </text:span><text:span text:style-name="T4">finally, </text:span><text:span text:style-name="T2">a quiet settling into the dust. It is intimate, strange, and preoccupied with impermanence — with what it feels like to be inside a moment that is already ending.</text:span></text:p>
      <text:p text:style-name="P1"><text:span text:style-name="T2">The subtitle — A Rapture in Three Acts — was chosen over 'Apocalypse' to distinguish the story's intimate register from its end-of-the-world setting. It is not a disaster narrative. It is a story about what it feels like to be held inside a moment that is already ending, and the particular tenderness of knowing it.</text:span></text:p>
      <text:p text:style-name="P3"><text:span text:style-name="T5">"The things we cherish over a lifetime become as fleeting as a moment in Love. Or the breaths that Lovers breathe together."</text:span></text:p>
      <text:p text:style-name="P4"><text:span text:style-name="T2">"I wrote this </text:span><text:span text:style-name="T6">kind of as I was falling into a dream</text:span><text:span text:style-name="T2">," says Needham. "</text:span><text:span text:style-name="T6">finishing it years later really took me to some vulnerable places I wasn’t expecting. </text:span><text:span text:style-name="T2">"</text:span></text:p>
      <text:p text:style-name="P1"><text:soft-page-break/><text:span text:style-name="T2">The story opens with an epigraph from King Missile's 'The Story of Willy' — a deliberate tonal counterpoint that positions the work's </text:span><text:span text:style-name="T4">absurdist “</text:span><text:span text:style-name="T2">apocalyptic” setting against a casual register, then departs from it entirely into something stranger and more tender.</text:span></text:p>
      <text:p text:style-name="P4"><text:span text:style-name="T2">We're Naked! — A Rapture in Three Acts is available in four editions at naked.chefmyklove.com. A $5 minimum donation grants the full interactive browser edition — featuring a scroll-triggered animat</text:span><text:span text:style-name="T4">ion</text:span><text:span text:style-name="T2"> built into the reading experience — with 50% of proceeds directed to the Nanaimo Pride Society. A standard epub is available for $2.99.</text:span></text:p>
      <text:p text:style-name="P4"><text:span text:style-name="T2">On June 16, 2026, a limited edition of 100 HTML ordinals will be inscribed permanently on the BSV blockchain. </text:span><text:span text:style-name="T4">In what is believed to be a first in canadian publishing history,</text:span><text:span text:style-name="T2"> holders may burn their ordinal to receive the only hand-bound signed </text:span><text:span text:style-name="T4">and numbered physical </text:span><text:span text:style-name="T2">chapbook that will ever exist from that token. No reprints.</text:span></text:p>
      <text:p text:style-name="P1"><text:span text:style-name="T2">Review copies available on request. Needham is available for interview and contributor pieces on independent publishing and blockchain in the arts.</text:span></text:p>
      <text:p text:style-name="P2"/>
      <text:p text:style-name="P4"><text:span text:style-name="T2">Needham is a multidisciplinary artist, software developer, photographer, and writer </text:span><text:span text:style-name="T7">honoured to be </text:span><text:span text:style-name="T2">living on the traditional </text:span><text:span text:style-name="T7">ancestoral lands </text:span><text:span text:style-name="T2">unceded </text:span><text:span text:style-name="T7">by </text:span><text:span text:style-name="T2">the Snuneymuxw Peoples in </text:span><text:span text:style-name="T7">what’s colonially known as </text:span><text:span text:style-name="T2">Nanaimo, </text:span><text:span text:style-name="T7">BC</text:span><text:span text:style-name="T2">. </text:span><text:span text:style-name="T8">Their</text:span><text:span text:style-name="T2"> prior blockchain publishing project — Ordinal Rainbows Vol.1, 64 original photographic works inscribed on BSV — is live at ordinalrainbows.com.</text:span></text:p>
      <text:p text:style-name="P2"/>
      <text:p text:style-name="P5"><text:span text:style-name="T1">— END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09T08:08:11.076000000</meta:creation-date>
    <dc:date>2026-05-12T20:18:40.478382700</dc:date>
    <meta:editing-duration>PT9M42S</meta:editing-duration>
    <meta:document-statistic meta:table-count="0" meta:image-count="0" meta:object-count="0" meta:page-count="2" meta:paragraph-count="18" meta:word-count="483" meta:character-count="3091" meta:non-whitespace-character-count="2609"/>
    <meta:generator>LibreOffice/25.8.6.1$Windows_X86_64 LibreOffice_project/85297ec6e49ec4e6faaa6f11880d49294fc70e60</meta:generator>
  </office:meta>
</office:document-meta>
</file>