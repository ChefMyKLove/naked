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50%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left="1.27cm" fo:margin-right="1.27cm" fo:margin-top="0.282cm" fo:margin-bottom="0.282cm" style:contextual-spacing="false" fo:line-height="150%"/>
    </style:style>
    <style:style style:name="P4" style:family="paragraph" style:parent-style-name="Standard">
      <style:paragraph-properties fo:margin-top="0cm" fo:margin-bottom="0.282cm" style:contextual-spacing="false" fo:line-height="150%"/>
      <style:text-properties officeooo:paragraph-rsid="0016f49e"/>
    </style:style>
    <style:style style:name="P5" style:family="paragraph" style:parent-style-name="Standard">
      <style:paragraph-properties fo:margin-top="0cm" fo:margin-bottom="0.282cm" style:contextual-spacing="false" fo:line-height="150%" fo:text-align="center" style:justify-single-word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text-transform="uppercas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officeooo:rsid="0017fb0b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officeooo:rsid="0017fb0b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6f49e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8" style:family="text">
      <style:text-properties style:font-name="Times New Roman" fo:font-size="12pt" fo:font-style="italic" officeooo:rsid="0016f49e" style:font-name-asian="Times New Roman1" style:font-size-asian="12pt" style:font-style-asian="italic" style:font-name-complex="Times New Roman1" style:font-size-complex="12pt" style:font-style-complex="italic"/>
    </style:style>
    <style:style style:name="T9" style:family="text">
      <style:text-properties style:font-name="Times New Roman" fo:font-size="12pt" officeooo:rsid="00170bcf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tact: </text:span><text:span text:style-name="T2">Michael Needham (ChefMyKLove)</text:span></text:p>
      <text:p text:style-name="P1"><text:span text:style-name="T1">Email: </text:span><text:span text:style-name="T2">chefmyklove@gmail.com</text:span></text:p>
      <text:p text:style-name="P1"><text:span text:style-name="T1">Web: </text:span><text:span text:style-name="T2">naked.chefmyklove.com</text:span></text:p>
      <text:p text:style-name="P1"><text:span text:style-name="T1">Interview: </text:span><text:span text:style-name="T2">Available on request</text:span></text:p>
      <text:p text:style-name="P2"/>
      <text:p text:style-name="P1"><text:span text:style-name="T3">FOR IMMEDIATE RELEASE</text:span></text:p>
      <text:p text:style-name="P1"><text:span text:style-name="T1">EMBARGOED UNTIL MAY 26, 2026 — 9:00 AM PDT</text:span></text:p>
      <text:p text:style-name="P2"/>
      <text:p text:style-name="P1"><text:span text:style-name="T1">Nanaimo Writer Launches Debut Story With Donation Tied to </text:span><text:span text:style-name="T4">Nanaimo</text:span><text:span text:style-name="T1"> Pride Society</text:span></text:p>
      <text:p text:style-name="P2"/>
      <text:p text:style-name="P1"><text:span text:style-name="T2">NANAIMO, BC, May 26, 2026 — Michael Needham, a Nanaimo-based artist, developer, and writer publishing under the pen name ChefMyKLove, releases </text:span><text:span text:style-name="T5">their</text:span><text:span text:style-name="T2"> debut short story We're Naked! — A Rapture in Three Acts today, launching simultaneously to a global digital audience while rooting the release in the local community.</text:span></text:p>
      <text:p text:style-name="P1"><text:span text:style-name="T2">The story is told in three acts: a morning waking in which two people reach for each other as the day opens up; a dream narrated to a companion, set at an apocalypse party in Central Park where </text:span><text:span text:style-name="T6">time is counting down and </text:span><text:span text:style-name="T2">no one panic</text:span><text:span text:style-name="T6">s</text:span><text:span text:style-name="T2">. It is intimate, strange, and preoccupied with impermanence; with what it feels like to be inside a moment that is already ending.</text:span></text:p>
      <text:p text:style-name="P1"><text:span text:style-name="T2">Central to the release is a $5 minimum donation tier that grants access to the full interactive browser version of the story, </text:span><text:span text:style-name="T6">featuring </text:span><text:span text:style-name="T2">animat</text:span><text:span text:style-name="T6">ions </text:span><text:span text:style-name="T2">built into the reading experience — with 50% of all proceeds from this tier donated directly to the Nanaimo Pride Society.</text:span></text:p>
      <text:p text:style-name="P3"><text:span text:style-name="T7">"Art and community aren't separate things.. </text:span><text:span text:style-name="T8">As a queer writer, t</text:span><text:span text:style-name="T7">his story belongs to </text:span><text:span text:style-name="T8">my</text:span><text:span text:style-name="T7"> community as much as it belongs to me."</text:span></text:p>
      <text:p text:style-name="P1"><text:span text:style-name="T2">"This release is an act of community," says Needham. "Nanaimo Pride Society does vital work here. Having this launch tied to them matters."</text:span></text:p>
      <text:p text:style-name="P4"><text:span text:style-name="T2">A standard epub is available for $2.99 </text:span><text:span text:style-name="T6">via all the regular sellers. <text:s/></text:span><text:span text:style-name="T5">E</text:span><text:span text:style-name="T6">ager readers can preorder </text:span><text:span text:style-name="T5">the story</text:span><text:span text:style-name="T6"> though naked.chefmyklove.com</text:span><text:span text:style-name="T2">. <text:s/></text:span><text:span text:style-name="T6">A few weeks later, o</text:span><text:span text:style-name="T2">n June 16, a limited </text:span><text:span text:style-name="T6">special </text:span><text:span text:style-name="T2">edition of 100 HTML ordinals will be inscribed on the BSV blockchain. <text:s/></text:span><text:span text:style-name="T6">In what’s believed to be the </text:span><text:soft-page-break/><text:span text:style-name="T6">first of its kind in canadian publishing history,</text:span><text:span text:style-name="T2"> each </text:span><text:span text:style-name="T6">artifact is </text:span><text:span text:style-name="T2">redeemable by burn for a hand-bound signed </text:span><text:span text:style-name="T6">and numbered phsical </text:span><text:span text:style-name="T2">chapbook — available nowhere else and never reprinted.</text:span></text:p>
      <text:p text:style-name="P1"><text:span text:style-name="T2">Needham is a software developer, photographer, and writer </text:span><text:span text:style-name="T6">honoured to be </text:span><text:span text:style-name="T2">living on the traditional </text:span><text:span text:style-name="T6">ancestoral lands </text:span><text:span text:style-name="T2">unceded </text:span><text:span text:style-name="T6">by </text:span><text:span text:style-name="T2">the Snuneymuxw Peoples in </text:span><text:span text:style-name="T6">what’s colonially known as </text:span><text:span text:style-name="T2">Nanaimo, </text:span><text:span text:style-name="T6">BC</text:span><text:span text:style-name="T2">. </text:span><text:span text:style-name="T9">Their</text:span><text:span text:style-name="T2"> prior blockchain publishing project — Ordinal Rainbows Vol.1, 64 original photographic works inscribed on BSV — is live at ordinalrainbows.com. He is available for interview.</text:span></text:p>
      <text:p text:style-name="P2"/>
      <text:p text:style-name="P5"><text:span text:style-name="T1">— END —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CA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</meta:editing-cycles>
    <meta:creation-date>2026-05-09T08:08:11.055000000</meta:creation-date>
    <dc:date>2026-05-12T19:29:31.679264400</dc:date>
    <meta:editing-duration>PT6M55S</meta:editing-duration>
    <meta:generator>LibreOffice/25.8.6.1$Windows_X86_64 LibreOffice_project/85297ec6e49ec4e6faaa6f11880d49294fc70e60</meta:generator>
    <meta:document-statistic meta:table-count="0" meta:image-count="0" meta:object-count="0" meta:page-count="2" meta:paragraph-count="15" meta:word-count="370" meta:character-count="2331" meta:non-whitespace-character-count="1964"/>
  </office:meta>
</office:document-meta>
</file>