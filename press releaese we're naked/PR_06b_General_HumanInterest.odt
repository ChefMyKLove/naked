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1.27cm" fo:margin-right="1.27cm" fo:margin-top="0.282cm" fo:margin-bottom="0.282cm" style:contextual-spacing="false" fo:line-height="150%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officeooo:paragraph-rsid="001ccce9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officeooo:rsid="001ccce9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officeooo:rsid="001d0a9d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6f49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70bc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act: </text:span><text:span text:style-name="T2">Michael Needham (ChefMyKLove)</text:span></text:p>
      <text:p text:style-name="P1"><text:span text:style-name="T1">Email: </text:span><text:span text:style-name="T2">chefmyklove@gmail.com</text:span></text:p>
      <text:p text:style-name="P1"><text:span text:style-name="T1">Web: </text:span><text:span text:style-name="T2">naked.chefmyklove.com</text:span></text:p>
      <text:p text:style-name="P1"><text:span text:style-name="T1">Interview: </text:span><text:span text:style-name="T2">Available on request</text:span></text:p>
      <text:p text:style-name="P2"/>
      <text:p text:style-name="P1"><text:span text:style-name="T3">FOR IMMEDIATE RELEASE</text:span></text:p>
      <text:p text:style-name="P1"><text:span text:style-name="T1">EMBARGOED UNTIL MAY 26, 2026 — 9:00 AM PDT</text:span></text:p>
      <text:p text:style-name="P2"/>
      <text:p text:style-name="P1"><text:span text:style-name="T1">A Nanaimo Writer Had a Dream in 2008. It Just Became a Published Story — and Part of the Money Goes to Pride.</text:span></text:p>
      <text:p text:style-name="P2"/>
      <text:p text:style-name="P1"><text:span text:style-name="T2">NANAIMO, BC, May 26, 2026 — </text:span><text:span text:style-name="T4">Twenty years ago </text:span><text:span text:style-name="T2">Michael Needham had a dream. In 2026, that dream is a published short story: We're Naked! — A Rapture in Three Acts, published under </text:span><text:span text:style-name="T4">their</text:span><text:span text:style-name="T2"> pen name ChefMyKLove, is available today at naked.chefmyklove.com.</text:span></text:p>
      <text:p text:style-name="P1"><text:span text:style-name="T2">The story is part surreal fiction, part dream narrative, part meditation on what it means to be present with another person </text:span><text:span text:style-name="T4">as</text:span><text:span text:style-name="T2"> everything changes. Two people wake up together, and one of them has a dream to tell — a dream about an apocalypse party in Central Park, </text:span><text:span text:style-name="T4">n</text:span><text:span text:style-name="T2">obody panicking. What happens next in their apartment is something </text:span><text:span text:style-name="T4">those best days are made of!</text:span></text:p>
      <text:p text:style-name="P3"><text:span text:style-name="T5">"WE'RE NAKED! SUCH morning! and a WHOLE day ahead."</text:span></text:p>
      <text:p text:style-name="P4"><text:span text:style-name="T2">"It started as a dream," says Needham. "I carried it for </text:span><text:span text:style-name="T4">two decades and when i brought it back to life it t</text:span><text:span text:style-name="T6">ook me to some vulnerable places I wasn’t expecting.” </text:span></text:p>
      <text:p text:style-name="P1"><text:span text:style-name="T2">For </text:span><text:span text:style-name="T4">a</text:span><text:span text:style-name="T2"> $5 </text:span><text:span text:style-name="T4">minimum donation </text:span><text:span text:style-name="T2">readers receive the full interactive browser version, which includes an animat</text:span><text:span text:style-name="T4">ion</text:span><text:span text:style-name="T2">built into the reading experience. Half of all proceeds from this tier go directly to the Nanaimo Pride Society. A standard epub downloads for $2.99. On June 16, a limited blockchain edition of 100 copies follows, each redeemable by burn for a hand-bound physical signed chapbook.</text:span></text:p>
      <text:p text:style-name="P4"><text:span text:style-name="T2">Needham is a software developer, photographer, and writer </text:span><text:span text:style-name="T7">honoured to be </text:span><text:span text:style-name="T2">living on the traditional </text:span><text:span text:style-name="T7">ancestoral lands </text:span><text:span text:style-name="T2">unceded </text:span><text:span text:style-name="T7">by </text:span><text:span text:style-name="T2">the Snuneymuxw Peoples in </text:span><text:span text:style-name="T7">what’s colonially known as </text:span><text:soft-page-break/><text:span text:style-name="T2">Nanaimo, </text:span><text:span text:style-name="T7">BC</text:span><text:span text:style-name="T2">. </text:span><text:span text:style-name="T8">Their</text:span><text:span text:style-name="T2"> prior blockchain publishing project — Ordinal Rainbows Vol.1, 64 original photographic works inscribed on BSV — is live at ordinalrainbows.com. He is available for interview.</text:span></text:p>
      <text:p text:style-name="P2"/>
      <text:p text:style-name="P5"><text:span text:style-name="T1">— END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CA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9T08:08:11.082000000</meta:creation-date>
    <dc:date>2026-05-12T20:26:01.219926900</dc:date>
    <meta:editing-duration>PT7M3S</meta:editing-duration>
    <meta:document-statistic meta:table-count="0" meta:image-count="0" meta:object-count="0" meta:page-count="2" meta:paragraph-count="14" meta:word-count="303" meta:character-count="1886" meta:non-whitespace-character-count="1587"/>
    <meta:generator>LibreOffice/25.8.6.1$Windows_X86_64 LibreOffice_project/85297ec6e49ec4e6faaa6f11880d49294fc70e60</meta:generator>
  </office:meta>
</office:document-meta>
</file>