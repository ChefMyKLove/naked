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50%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.282cm" style:contextual-spacing="false" fo:line-height="150%"/>
      <style:text-properties officeooo:paragraph-rsid="001f85ae"/>
    </style:style>
    <style:style style:name="P4" style:family="paragraph" style:parent-style-name="Standard">
      <style:paragraph-properties fo:margin-left="1.27cm" fo:margin-right="1.27cm" fo:margin-top="0.282cm" fo:margin-bottom="0.282cm" style:contextual-spacing="false" fo:line-height="150%"/>
    </style:style>
    <style:style style:name="P5" style:family="paragraph" style:parent-style-name="Standard">
      <style:paragraph-properties fo:margin-top="0cm" fo:margin-bottom="0.282cm" style:contextual-spacing="false" fo:line-height="150%" fo:text-align="center" style:justify-single-word="fals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text-transform="uppercas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officeooo:rsid="001d0a9d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6" style:family="text">
      <style:text-properties style:font-name="Times New Roman" fo:font-size="12pt" officeooo:rsid="0016f49e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70bcf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tact: </text:span><text:span text:style-name="T2">Michael Needham (ChefMyKLove)</text:span></text:p>
      <text:p text:style-name="P1"><text:span text:style-name="T1">Email: </text:span><text:span text:style-name="T2">chefmyklove@gmail.com</text:span></text:p>
      <text:p text:style-name="P1"><text:span text:style-name="T1">Web: </text:span><text:span text:style-name="T2">naked.chefmyklove.com</text:span></text:p>
      <text:p text:style-name="P1"><text:span text:style-name="T1">Interview: </text:span><text:span text:style-name="T2">Available on request</text:span></text:p>
      <text:p text:style-name="P2"/>
      <text:p text:style-name="P1"><text:span text:style-name="T3">FOR IMMEDIATE RELEASE</text:span></text:p>
      <text:p text:style-name="P1"><text:span text:style-name="T1">EMBARGOED UNTIL MAY 26, 2026 — 9:00 AM PDT</text:span></text:p>
      <text:p text:style-name="P2"/>
      <text:p text:style-name="P1"><text:span text:style-name="T1">Queer Nanaimo Writer Self-Publishes Debut Story — Four Editions Including a World-First Blockchain Burn Mechanic</text:span></text:p>
      <text:p text:style-name="P2"/>
      <text:p text:style-name="P1"><text:span text:style-name="T2">NANAIMO, BC, May 26, 2026 — Michael Needham, a queer artist, developer, and writer based in Nanaimo, BC, publishing under the pen name ChefMyKLove, releases his debut short story We're Naked! — A Rapture in Three Acts today — a surreal, intimate work of literary fiction published entirely independently across four editions, including what is believed to be a first-of-its-kind burn mechanic in literary publishing.</text:span></text:p>
      <text:p text:style-name="P3"><text:span text:style-name="T2">The story is told in three acts: a morning waking in which two people reach for each other as the day opens up; a dream narrated to a companion, set at an apocalypse party in Central Park where no one panics </text:span><text:span text:style-name="T4">as the world ends</text:span><text:span text:style-name="T2">; and a quiet settling into the dust. It is intimate, strange, and preoccupied with impermanence — with what it feels like to be inside a moment that is already ending.</text:span></text:p>
      <text:p text:style-name="P4"><text:span text:style-name="T5">"The things we cherish over a lifetime become as fleeting as a moment in Love. Or the breaths that Lovers breathe together."</text:span></text:p>
      <text:p text:style-name="P1"><text:span text:style-name="T2">"I wrote this the way you fall into a dream — not quite knowing when it started," says Needham. "It cost me something to finish. I'm still not entirely sure what."</text:span></text:p>
      <text:p text:style-name="P1"><text:span text:style-name="T2">A $5 minimum donation grants the full interactive browser edition of the story — with a scroll-triggered animated dust cloud built into the reading experience — and directs 50% of proceeds to </text:span><text:soft-page-break/><text:span text:style-name="T2">the Nanaimo Pride Society. A standard epub is available for $2.99. Both at naked.chefmyklove.com.</text:span></text:p>
      <text:p text:style-name="P3"><text:span text:style-name="T2">On June 16, Needham releases a limited edition of 100 HTML ordinals inscribed on the BSV blockchain— the complete story, permanently on-chain. </text:span><text:span text:style-name="T4">In what is believed to be a first in canadian publishing history, h</text:span><text:span text:style-name="T2">olders </text:span><text:span text:style-name="T4">of these artifacts, who chose to </text:span><text:span text:style-name="T2">burn their token receive the only physical signed </text:span><text:span text:style-name="T4">and numbered </text:span><text:span text:style-name="T2">Coptic-stitched chapbook from it. No reprints. No second run. The total number of physical copies in existence is determined by how many </text:span><text:span text:style-name="T4">of the hundred </text:span><text:span text:style-name="T2">holders choose to give something up. <text:s/></text:span><text:span text:style-name="T4">Probably the rarest piece of literature in the country</text:span></text:p>
      <text:p text:style-name="P2"/>
      <text:p text:style-name="P3"><text:span text:style-name="T2">Needham is a multidisciplinary artist, software developer, photographer, and writer </text:span><text:span text:style-name="T6">honoured to be </text:span><text:span text:style-name="T2">living on the traditional </text:span><text:span text:style-name="T6">ancestoral lands </text:span><text:span text:style-name="T2">unceded </text:span><text:span text:style-name="T6">by </text:span><text:span text:style-name="T2">the Snuneymuxw Peoples in </text:span><text:span text:style-name="T6">what’s colonially known as </text:span><text:span text:style-name="T2">Nanaimo, </text:span><text:span text:style-name="T6">BC</text:span><text:span text:style-name="T2">. </text:span><text:span text:style-name="T7">Their</text:span><text:span text:style-name="T2"> prior blockchain publishing project — Ordinal Rainbows Vol.1, 64 original photographic works inscribed on BSV — is live at ordinalrainbows.com. He is available for interview.</text:span></text:p>
      <text:p text:style-name="P2"/>
      <text:p text:style-name="P5"><text:span text:style-name="T1">— END —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CA" style:letter-kerning="false" style:font-name-asian="Times New Roman1" style:font-size-asian="12pt" style:language-asian="zh" style:country-asian="CN" style:font-name-complex="Times New Roman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CA" style:letter-kerning="false" style:font-name-asian="Times New Roman1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5-09T08:08:11.073000000</meta:creation-date>
    <dc:date>2026-05-12T19:54:18.048065300</dc:date>
    <meta:editing-duration>PT8M49S</meta:editing-duration>
    <meta:document-statistic meta:table-count="0" meta:image-count="0" meta:object-count="0" meta:page-count="2" meta:paragraph-count="15" meta:word-count="416" meta:character-count="2646" meta:non-whitespace-character-count="2231"/>
    <meta:generator>LibreOffice/25.8.6.1$Windows_X86_64 LibreOffice_project/85297ec6e49ec4e6faaa6f11880d49294fc70e60</meta:generator>
  </office:meta>
</office:document-meta>
</file>