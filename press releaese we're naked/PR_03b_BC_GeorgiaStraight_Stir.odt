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left="1.27cm" fo:margin-right="1.27cm" fo:margin-top="0.282cm" fo:margin-bottom="0.282cm" style:contextual-spacing="false" fo:line-height="150%"/>
    </style:style>
    <style:style style:name="P4" style:family="paragraph" style:parent-style-name="Standard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officeooo:rsid="001d0a9d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act: </text:span><text:span text:style-name="T2">Michael Needham (ChefMyKLove)</text:span></text:p>
      <text:p text:style-name="P1"><text:span text:style-name="T1">Email: </text:span><text:span text:style-name="T2">chefmyklove@gmail.com</text:span></text:p>
      <text:p text:style-name="P1"><text:span text:style-name="T1">Web: </text:span><text:span text:style-name="T2">naked.chefmyklove.com</text:span></text:p>
      <text:p text:style-name="P1"><text:span text:style-name="T1">Interview: </text:span><text:span text:style-name="T2">Available on request</text:span></text:p>
      <text:p text:style-name="P2"/>
      <text:p text:style-name="P1"><text:span text:style-name="T3">FOR IMMEDIATE RELEASE</text:span></text:p>
      <text:p text:style-name="P1"><text:span text:style-name="T1">EMBARGOED UNTIL MAY 26, 2026 — 9:00 AM PDT</text:span></text:p>
      <text:p text:style-name="P2"/>
      <text:p text:style-name="P1"><text:span text:style-name="T1">We're Naked! Is a BC Debut Worth Your Time — Surreal, Intimate, and Unlike Anything Else Publishing This Season</text:span></text:p>
      <text:p text:style-name="P2"/>
      <text:p text:style-name="P1"><text:span text:style-name="T2">NANAIMO, BC, May 26, 2026 — There is a story. It is a love story. It is also an apocalypse story. It centres a dream, two naked people, and forty-nine minutes left before the world ends. It is called We're Naked! — A Rapture in Three Acts, and it is the debut published fiction of Michael Needham, a Nanaimo-based artist, developer, and writer publishing under the pen name ChefMyKLove. It releases today and it is very good.</text:span></text:p>
      <text:p text:style-name="P1"><text:span text:style-name="T2">The story is told in three acts: a morning waking in which two people reach for each other as the day opens up; a dream narrated to a companion, set at an apocalypse party in Central Park where no one panics </text:span><text:span text:style-name="T4">as the world ends</text:span><text:span text:style-name="T2">; and a quiet settling into the dust. It is intimate, strange, and preoccupied with impermanence — with what it feels like to be inside a moment that is already ending.</text:span></text:p>
      <text:p text:style-name="P3"><text:span text:style-name="T5">"Like we were having a little mini communion with the dreamscape aether."</text:span></text:p>
      <text:p text:style-name="P1"><text:span text:style-name="T2">"I wrote this </text:span><text:span text:style-name="T4">kind of as I was falling into a dream</text:span><text:span text:style-name="T2">," says Needham. "</text:span><text:span text:style-name="T4">finishing it years later really took me to some vulnerable places I wasn’t expecting. </text:span><text:span text:style-name="T2">"</text:span></text:p>
      <text:p text:style-name="P1"><text:span text:style-name="T2">A $5 donation grants the full interactive browser version — with a scroll-triggered animat</text:span><text:span text:style-name="T4">ion </text:span><text:span text:style-name="T2">that activates during the story's climactic scene and 50% of proceeds going to Nanaimo Pride Society. A standard epub is $2.99. Both at naked.chefmyklove.com.</text:span></text:p>
      <text:p text:style-name="P1"><text:soft-page-break/><text:span text:style-name="T2">On June 16, Needham releases a limited edition of 100 HTML ordinals inscribed on the BSV blockchain— the complete story, permanently on-chain. </text:span><text:span text:style-name="T4">In what is believed to be a first in canadian publishing history, h</text:span><text:span text:style-name="T2">olders </text:span><text:span text:style-name="T4">of these artifacts, who chose to </text:span><text:span text:style-name="T2">burn their token receive the only physical signed </text:span><text:span text:style-name="T4">and numbered </text:span><text:span text:style-name="T2">Coptic-stitched chapbook from it. No reprints. No second run. The total number of physical copies in existence is determined by how many </text:span><text:span text:style-name="T4">of the hundred </text:span><text:span text:style-name="T2">holders choose to give something up. <text:s/></text:span><text:span text:style-name="T4">Probably the rarest piece of literature in the country</text:span></text:p>
      <text:p text:style-name="P1"><text:span text:style-name="T2">Review cop</text:span><text:span text:style-name="T4">y</text:span><text:span text:style-name="T2"> available on request. Needham is available for interview.</text:span></text:p>
      <text:p text:style-name="P2"/>
      <text:p text:style-name="P4"><text:span text:style-name="T1">— END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9T08:08:11.070000000</meta:creation-date>
    <dc:date>2026-05-12T19:44:35.245638500</dc:date>
    <meta:editing-duration>PT6M45S</meta:editing-duration>
    <meta:document-statistic meta:table-count="0" meta:image-count="0" meta:object-count="0" meta:page-count="2" meta:paragraph-count="15" meta:word-count="370" meta:character-count="2229" meta:non-whitespace-character-count="1865"/>
    <meta:generator>LibreOffice/25.8.6.1$Windows_X86_64 LibreOffice_project/85297ec6e49ec4e6faaa6f11880d49294fc70e60</meta:generator>
  </office:meta>
</office:document-meta>
</file>