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style:contextual-spacing="false" fo:line-height="150%"/>
    </style:style>
    <style:style style:name="P2" style:family="paragraph" style:parent-style-name="Standard">
      <style:paragraph-properties fo:margin-top="0cm" fo:margin-bottom="0cm" style:contextual-spacing="false"/>
    </style:style>
    <style:style style:name="P3" style:family="paragraph" style:parent-style-name="Standard">
      <style:paragraph-properties fo:margin-left="1.27cm" fo:margin-right="1.27cm" fo:margin-top="0.282cm" fo:margin-bottom="0.282cm" style:contextual-spacing="false" fo:line-height="150%"/>
    </style:style>
    <style:style style:name="P4" style:family="paragraph" style:parent-style-name="Standard">
      <style:paragraph-properties fo:margin-top="0cm" fo:margin-bottom="0.282cm" style:contextual-spacing="false" fo:line-height="150%"/>
      <style:text-properties officeooo:paragraph-rsid="001423b6"/>
    </style:style>
    <style:style style:name="P5" style:family="paragraph" style:parent-style-name="Standard">
      <style:paragraph-properties fo:margin-top="0cm" fo:margin-bottom="0.282cm" style:contextual-spacing="false" fo:line-height="150%" fo:text-align="center" style:justify-single-word="false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fo:text-transform="uppercase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5" style:family="text">
      <style:text-properties style:font-name="Times New Roman" fo:font-size="12pt" officeooo:rsid="0016f49e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170bcf" style:font-name-asian="Times New Roman1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ntact: </text:span><text:span text:style-name="T2">Michael Needham (ChefMyKLove)</text:span></text:p>
      <text:p text:style-name="P1"><text:span text:style-name="T1">Email: </text:span><text:span text:style-name="T2">chefmyklove@gmail.com</text:span></text:p>
      <text:p text:style-name="P1"><text:span text:style-name="T1">Web: </text:span><text:span text:style-name="T2">naked.chefmyklove.com</text:span></text:p>
      <text:p text:style-name="P1"><text:span text:style-name="T1">Interview: </text:span><text:span text:style-name="T2">Available on request</text:span></text:p>
      <text:p text:style-name="P2"/>
      <text:p text:style-name="P1"><text:span text:style-name="T3">FOR IMMEDIATE RELEASE</text:span></text:p>
      <text:p text:style-name="P1"><text:span text:style-name="T1">EMBARGOED UNTIL MAY 26, 2026 — 9:00 AM PDT</text:span></text:p>
      <text:p text:style-name="P2"/>
      <text:p text:style-name="P1"><text:span text:style-name="T1">Vancouver Island Author's Debut Story Launches Globally With a World-First Literary Blockchain Mechanic</text:span></text:p>
      <text:p text:style-name="P2"/>
      <text:p text:style-name="P1"><text:span text:style-name="T2">NANAIMO, BC, May 26, 2026 — Michael Needham, a Nanaimo-based artist, developer, and writer publishing under the pen name ChefMyKLove, publishes his debut short story We're Naked! — A Rapture in Three Acts today — a lyrical, surreal work of literary fiction arriving alongside a publishing model without precedent.</text:span></text:p>
      <text:p text:style-name="P1"><text:span text:style-name="T2">The story is told in three acts: a morning waking in which two people reach for each other as the day opens up; a dream narrated to a companion, set at an apocalypse party in Central Park where forty-nine minutes remain and no one panics; and a quiet settling into the dust. It is intimate, strange, and preoccupied with impermanence — with what it feels like to be inside a moment that is already ending.</text:span></text:p>
      <text:p text:style-name="P1"><text:span text:style-name="T2">The subtitle — A Rapture in Three Acts — was chosen over 'Apocalypse' to hold the work's intimate register distinct from its end-of-the-world setting. It is not a disaster story.</text:span></text:p>
      <text:p text:style-name="P3"><text:span text:style-name="T4">"Like being held by something so vast and indifferent and somehow still SO Loving. Like the universe's way of saying 'Welcome home.'"</text:span></text:p>
      <text:p text:style-name="P1"><text:span text:style-name="T2">"I wrote this the way you fall into a dream — not quite knowing when it started," says Needham. "It cost me something to finish."</text:span></text:p>
      <text:p text:style-name="P1"><text:span text:style-name="T2">We're Naked! — A Rapture in Three Acts is available in four editions at naked.chefmyklove.com. A $5 minimum donation grants the full interactive browser edition — </text:span><text:soft-page-break/><text:span text:style-name="T2">featuring a scroll-triggered animated dust cloud built into the reading experience — with 50% of proceeds directed to the Nanaimo Pride Society. A standard epub is available for $2.99. On June 16, 2026, a limited edition of 100 HTML ordinals will be inscribed permanently on the BSV blockchain at $100 each; holders may burn their ordinal to receive the only hand-bound physical signed chapbook that will ever exist from that token. No reprints.</text:span></text:p>
      <text:p text:style-name="P1"><text:span text:style-name="T2">The burn mechanic — in which a holder permanently destroys their digital edition to receive the only physical signed copy from it — is believed to be a first in literary publishing. The total number of physical copies that will ever exist is determined entirely by how many holders choose to burn.</text:span></text:p>
      <text:p text:style-name="P4"><text:span text:style-name="T2">Needham is a software developer, photographer, and writer </text:span><text:span text:style-name="T5">honoured to be </text:span><text:span text:style-name="T2">living on the traditional </text:span><text:span text:style-name="T5">ancestoral lands </text:span><text:span text:style-name="T2">unceded </text:span><text:span text:style-name="T5">by </text:span><text:span text:style-name="T2">the Snuneymuxw Peoples in </text:span><text:span text:style-name="T5">what’s colonially known as </text:span><text:span text:style-name="T2">Nanaimo, </text:span><text:span text:style-name="T5">BC</text:span><text:span text:style-name="T2">. </text:span><text:span text:style-name="T6">Their</text:span><text:span text:style-name="T2"> prior blockchain publishing project — Ordinal Rainbows Vol.1, 64 original photographic works inscribed on BSV — is live at ordinalrainbows.com. Review copies available on request. He is available for interview.</text:span></text:p>
      <text:p text:style-name="P2"/>
      <text:p text:style-name="P5"><text:span text:style-name="T1">— END —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CA" style:letter-kerning="false" style:font-name-asian="Times New Roman1" style:font-size-asian="12pt" style:language-asian="zh" style:country-asian="CN" style:font-name-complex="Times New Roman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en" fo:country="CA" style:letter-kerning="false" style:font-name-asian="Times New Roman1" style:font-size-asian="12pt" style:language-asian="zh" style:country-asian="CN" style:font-name-complex="Times New Roman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chapter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chapter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loext:linked-style-name="End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2</meta:editing-cycles>
    <meta:creation-date>2026-05-09T08:08:11.066000000</meta:creation-date>
    <dc:date>2026-05-12T20:36:16.650441400</dc:date>
    <meta:editing-duration>PT1M46S</meta:editing-duration>
    <meta:document-statistic meta:table-count="0" meta:image-count="0" meta:object-count="0" meta:page-count="2" meta:paragraph-count="16" meta:word-count="435" meta:character-count="2768" meta:non-whitespace-character-count="2332"/>
    <meta:generator>LibreOffice/25.8.6.1$Windows_X86_64 LibreOffice_project/85297ec6e49ec4e6faaa6f11880d49294fc70e60</meta:generator>
  </office:meta>
</office:document-meta>
</file>