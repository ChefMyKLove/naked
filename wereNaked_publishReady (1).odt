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aramond" svg:font-family="Garamond" style:font-family-generic="roman" style:font-pitch="variable"/>
    <style:font-face style:name="Garamond1" svg:font-family="Garamond" style:font-family-generic="swiss" style:font-pitch="variable"/>
    <style:font-face style:name="Garamond2" svg:font-family="Garamond"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5.08cm" style:contextual-spacing="false"/>
    </style:style>
    <style:style style:name="P2" style:family="paragraph" style:parent-style-name="Standard">
      <style:paragraph-properties fo:margin-top="0cm" fo:margin-bottom="0.212cm" style:contextual-spacing="false" fo:text-align="center" style:justify-single-word="false"/>
    </style:style>
    <style:style style:name="P3" style:family="paragraph" style:parent-style-name="Standard">
      <style:paragraph-properties fo:margin-top="0cm" fo:margin-bottom="0.212cm" style:contextual-spacing="false"/>
    </style:style>
    <style:style style:name="P4" style:family="paragraph" style:parent-style-name="Standard">
      <style:paragraph-properties fo:margin-top="0cm" fo:margin-bottom="0.847cm" style:contextual-spacing="false"/>
    </style:style>
    <style:style style:name="P5" style:family="paragraph" style:parent-style-name="Standard">
      <style:paragraph-properties fo:margin-top="0cm" fo:margin-bottom="0cm" style:contextual-spacing="false" fo:text-align="center" style:justify-single-word="false"/>
    </style:style>
    <style:style style:name="P6" style:family="paragraph" style:parent-style-name="Standard">
      <style:paragraph-properties fo:margin-top="0cm" fo:margin-bottom="5.08cm" style:contextual-spacing="false" fo:break-before="page"/>
    </style:style>
    <style:style style:name="P7" style:family="paragraph" style:parent-style-name="Standard">
      <style:paragraph-properties fo:margin-top="0cm" fo:margin-bottom="0.423cm" style:contextual-spacing="false"/>
    </style:style>
    <style:style style:name="P8" style:family="paragraph" style:parent-style-name="Standard">
      <style:paragraph-properties fo:margin-top="0cm" fo:margin-bottom="4.233cm" style:contextual-spacing="false" fo:break-before="page"/>
    </style:style>
    <style:style style:name="P9" style:family="paragraph" style:parent-style-name="Standard">
      <style:paragraph-properties fo:margin-top="0cm" fo:margin-bottom="0cm" style:contextual-spacing="false" fo:line-height="150%" fo:text-align="center" style:justify-single-word="false"/>
    </style:style>
    <style:style style:name="P10" style:family="paragraph" style:parent-style-name="Standard">
      <style:paragraph-properties fo:margin-top="0cm" fo:margin-bottom="1.693cm" style:contextual-spacing="false" fo:break-before="page"/>
    </style:style>
    <style:style style:name="P11" style:family="paragraph" style:parent-style-name="Heading_20_1">
      <style:paragraph-properties fo:margin-top="0cm" fo:margin-bottom="0.847cm" style:contextual-spacing="false" fo:text-align="center" style:justify-single-word="false" fo:break-before="page"/>
    </style:style>
    <style:style style:name="P12" style:family="paragraph" style:parent-style-name="Standard">
      <style:paragraph-properties fo:margin-top="0cm" fo:margin-bottom="0cm" style:contextual-spacing="false" fo:line-height="150%"/>
    </style:style>
    <style:style style:name="P13" style:family="paragraph" style:parent-style-name="Standard">
      <style:paragraph-properties fo:margin-left="1.27cm" fo:margin-top="0cm" fo:margin-bottom="0cm" style:contextual-spacing="false" fo:line-height="150%"/>
    </style:style>
    <style:style style:name="P14" style:family="paragraph" style:parent-style-name="Standard">
      <style:paragraph-properties fo:margin-left="1.27cm" fo:margin-top="0cm" fo:margin-bottom="0cm" style:contextual-spacing="false" fo:line-height="150%"/>
      <style:text-properties style:font-name="Garamond" fo:font-size="12pt" officeooo:paragraph-rsid="001ec843" style:font-name-asian="Garamond2" style:font-size-asian="12pt" style:font-name-complex="Garamond2" style:font-size-complex="12pt"/>
    </style:style>
    <style:style style:name="P15" style:family="paragraph" style:parent-style-name="Standard">
      <style:paragraph-properties fo:margin-left="1.27cm" fo:margin-top="0cm" fo:margin-bottom="0cm" style:contextual-spacing="false" fo:line-height="150%"/>
      <style:text-properties style:font-name="Garamond" fo:font-size="12pt" officeooo:paragraph-rsid="0007abbf" style:font-name-asian="Garamond2" style:font-size-asian="12pt" style:font-name-complex="Garamond2" style:font-size-complex="12pt"/>
    </style:style>
    <style:style style:name="P16" style:family="paragraph" style:parent-style-name="Standard">
      <style:paragraph-properties fo:margin-left="1.27cm" fo:margin-top="0cm" fo:margin-bottom="0cm" style:contextual-spacing="false" fo:line-height="150%"/>
      <style:text-properties officeooo:paragraph-rsid="0012682e"/>
    </style:style>
    <style:style style:name="P17" style:family="paragraph" style:parent-style-name="Standard">
      <style:paragraph-properties fo:margin-left="1.27cm" fo:margin-top="0cm" fo:margin-bottom="0cm" style:contextual-spacing="false" fo:line-height="150%"/>
      <style:text-properties style:font-name="Garamond" fo:font-size="12pt" officeooo:paragraph-rsid="0012682e" style:font-name-asian="Garamond2" style:font-size-asian="12pt" style:font-name-complex="Garamond2" style:font-size-complex="12pt"/>
    </style:style>
    <style:style style:name="P18" style:family="paragraph" style:parent-style-name="Standard">
      <style:paragraph-properties fo:margin-left="1.27cm" fo:margin-top="0cm" fo:margin-bottom="0cm" style:contextual-spacing="false" fo:line-height="150%"/>
      <style:text-properties officeooo:paragraph-rsid="00129f55"/>
    </style:style>
    <style:style style:name="P19" style:family="paragraph" style:parent-style-name="Standard">
      <style:paragraph-properties fo:margin-left="1.27cm" fo:margin-top="0cm" fo:margin-bottom="0cm" style:contextual-spacing="false" fo:line-height="150%"/>
      <style:text-properties style:font-name="Garamond" fo:font-size="12pt" fo:font-weight="bold" officeooo:paragraph-rsid="000aa914" style:font-name-asian="Garamond2" style:font-size-asian="12pt" style:font-weight-asian="bold" style:font-name-complex="Garamond2" style:font-size-complex="12pt" style:font-weight-complex="bold"/>
    </style:style>
    <style:style style:name="P20" style:family="paragraph" style:parent-style-name="Standard">
      <style:paragraph-properties fo:margin-left="1.27cm" fo:margin-top="0cm" fo:margin-bottom="0cm" style:contextual-spacing="false" fo:line-height="150%"/>
      <style:text-properties style:font-name="Garamond" fo:font-size="12pt" officeooo:paragraph-rsid="000aa914" style:font-name-asian="Garamond2" style:font-size-asian="12pt" style:font-name-complex="Garamond2" style:font-size-complex="12pt"/>
    </style:style>
    <style:style style:name="P21" style:family="paragraph" style:parent-style-name="Standard">
      <style:paragraph-properties fo:margin-left="1.27cm" fo:margin-top="0cm" fo:margin-bottom="0cm" style:contextual-spacing="false" fo:line-height="150%"/>
      <style:text-properties style:font-name="Garamond" fo:font-size="12pt" fo:font-weight="bold" officeooo:paragraph-rsid="00162aa5" style:font-name-asian="Garamond2" style:font-size-asian="12pt" style:font-weight-asian="bold" style:font-name-complex="Garamond2" style:font-size-complex="12pt" style:font-weight-complex="bold"/>
    </style:style>
    <style:style style:name="P22" style:family="paragraph" style:parent-style-name="Standard">
      <style:paragraph-properties fo:margin-left="1.27cm" fo:margin-top="0cm" fo:margin-bottom="0cm" style:contextual-spacing="false" fo:line-height="150%"/>
      <style:text-properties officeooo:paragraph-rsid="00162aa5"/>
    </style:style>
    <style:style style:name="P23" style:family="paragraph" style:parent-style-name="Standard">
      <style:paragraph-properties fo:margin-left="1.27cm" fo:margin-top="0cm" fo:margin-bottom="0cm" style:contextual-spacing="false" fo:line-height="150%"/>
      <style:text-properties style:font-name="Garamond" fo:font-size="12pt" officeooo:paragraph-rsid="000ad788" style:font-name-asian="Garamond2" style:font-size-asian="12pt" style:font-name-complex="Garamond2" style:font-size-complex="12pt"/>
    </style:style>
    <style:style style:name="P24" style:family="paragraph" style:parent-style-name="Standard">
      <style:paragraph-properties fo:margin-left="1.27cm" fo:margin-top="0cm" fo:margin-bottom="0cm" style:contextual-spacing="false" fo:line-height="150%"/>
      <style:text-properties style:font-name="Garamond" fo:font-size="12pt" officeooo:rsid="00162aa5" officeooo:paragraph-rsid="00162aa5" style:font-name-asian="Garamond2" style:font-size-asian="12pt" style:font-name-complex="Garamond2" style:font-size-complex="12pt"/>
    </style:style>
    <style:style style:name="P25" style:family="paragraph" style:parent-style-name="Standard">
      <style:paragraph-properties fo:margin-left="0cm" fo:margin-top="0cm" fo:margin-bottom="0cm" style:contextual-spacing="false" fo:line-height="150%" fo:text-indent="0cm" style:auto-text-indent="false"/>
    </style:style>
    <style:style style:name="P26" style:family="paragraph" style:parent-style-name="Standard">
      <style:paragraph-properties fo:margin-top="0cm" fo:margin-bottom="0cm" style:contextual-spacing="false" fo:line-height="150%"/>
      <style:text-properties officeooo:paragraph-rsid="00274e7d"/>
    </style:style>
    <style:style style:name="P27" style:family="paragraph" style:parent-style-name="Standard">
      <style:paragraph-properties fo:margin-top="0cm" fo:margin-bottom="0cm" style:contextual-spacing="false" fo:line-height="150%"/>
      <style:text-properties style:font-name="Garamond" fo:font-size="12pt" officeooo:paragraph-rsid="00274e7d" style:font-name-asian="Garamond2" style:font-size-asian="12pt" style:font-name-complex="Garamond2" style:font-size-complex="12pt"/>
    </style:style>
    <style:style style:name="P28" style:family="paragraph" style:parent-style-name="Standard">
      <style:paragraph-properties fo:margin-left="1.27cm" fo:margin-top="0cm" fo:margin-bottom="0cm" style:contextual-spacing="false" fo:line-height="150%"/>
      <style:text-properties style:font-name="Garamond" fo:font-size="12pt" officeooo:paragraph-rsid="000c6574" style:font-name-asian="Garamond2" style:font-size-asian="12pt" style:font-name-complex="Garamond2" style:font-size-complex="12pt"/>
    </style:style>
    <style:style style:name="P29" style:family="paragraph" style:parent-style-name="Standard">
      <style:paragraph-properties fo:margin-top="0cm" fo:margin-bottom="0.423cm" style:contextual-spacing="false"/>
      <style:text-properties officeooo:rsid="000c6574" officeooo:paragraph-rsid="000c6574"/>
    </style:style>
    <style:style style:name="P30" style:family="paragraph" style:parent-style-name="Standard">
      <style:paragraph-properties fo:margin-left="2.54cm" fo:margin-top="0cm" fo:margin-bottom="0cm" style:contextual-spacing="false" fo:line-height="150%"/>
    </style:style>
    <style:style style:name="P31" style:family="paragraph" style:parent-style-name="Standard">
      <style:paragraph-properties fo:margin-top="0cm" fo:margin-bottom="0cm" style:contextual-spacing="false" fo:line-height="150%"/>
      <style:text-properties fo:font-weight="normal" style:font-weight-asian="normal" style:font-weight-complex="normal"/>
    </style:style>
    <style:style style:name="P32" style:family="paragraph" style:parent-style-name="Standard">
      <style:paragraph-properties fo:margin-left="1.27cm" fo:margin-top="0cm" fo:margin-bottom="0cm" style:contextual-spacing="false" fo:line-height="150%"/>
      <style:text-properties officeooo:paragraph-rsid="000c6574"/>
    </style:style>
    <style:style style:name="P33" style:family="paragraph" style:parent-style-name="Standard">
      <style:paragraph-properties fo:margin-top="0cm" fo:margin-bottom="2.54cm" style:contextual-spacing="false" fo:break-before="page"/>
    </style:style>
    <style:style style:name="T1" style:family="text">
      <style:text-properties style:font-name="Garamond" fo:font-size="32pt" fo:font-weight="normal" style:font-name-asian="Garamond2" style:font-size-asian="32pt" style:font-weight-asian="normal" style:font-name-complex="Garamond2" style:font-size-complex="32pt" style:font-weight-complex="normal"/>
    </style:style>
    <style:style style:name="T2" style:family="text">
      <style:text-properties style:font-name="Garamond" fo:font-size="14pt" fo:font-style="italic" style:font-name-asian="Garamond2" style:font-size-asian="14pt" style:font-style-asian="italic" style:font-name-complex="Garamond2" style:font-size-complex="14pt" style:font-style-complex="italic"/>
    </style:style>
    <style:style style:name="T3" style:family="text">
      <style:text-properties style:font-name="Garamond" fo:font-size="12pt" style:font-name-asian="Garamond2" style:font-size-asian="12pt" style:font-name-complex="Garamond2" style:font-size-complex="12pt"/>
    </style:style>
    <style:style style:name="T4" style:family="text">
      <style:text-properties style:font-name="Garamond" fo:font-size="10pt" style:font-name-asian="Garamond2" style:font-size-asian="10pt" style:font-name-complex="Garamond2" style:font-size-complex="10pt"/>
    </style:style>
    <style:style style:name="T5" style:family="text">
      <style:text-properties style:font-name="Garamond" fo:font-size="11pt" fo:font-style="italic" style:font-name-asian="Garamond2" style:font-size-asian="11pt" style:font-style-asian="italic" style:font-name-complex="Garamond2" style:font-size-complex="11pt" style:font-style-complex="italic"/>
    </style:style>
    <style:style style:name="T6" style:family="text">
      <style:text-properties style:font-name="Garamond" fo:font-size="16pt" fo:font-style="normal" fo:font-weight="bold" style:font-name-asian="Garamond2" style:font-size-asian="16pt" style:font-style-asian="normal" style:font-weight-asian="bold" style:font-name-complex="Garamond2" style:font-size-complex="16pt" style:font-style-complex="normal" style:font-weight-complex="bold"/>
    </style:style>
    <style:style style:name="T7" style:family="text">
      <style:text-properties style:font-name="Garamond" fo:font-size="12pt" fo:font-style="italic" fo:font-weight="normal" style:font-name-asian="Garamond2" style:font-size-asian="12pt" style:font-style-asian="italic" style:font-weight-asian="normal" style:font-name-complex="Garamond2" style:font-size-complex="12pt" style:font-style-complex="italic" style:font-weight-complex="normal"/>
    </style:style>
    <style:style style:name="T8" style:family="text">
      <style:text-properties style:font-name="Garamond" fo:font-size="16pt" fo:font-weight="bold" style:font-name-asian="Garamond2" style:font-size-asian="16pt" style:font-weight-asian="bold" style:font-name-complex="Garamond2" style:font-size-complex="16pt" style:font-weight-complex="bold"/>
    </style:style>
    <style:style style:name="T9" style:family="text">
      <style:text-properties style:font-name="Garamond" fo:font-size="20pt" fo:font-style="normal" fo:font-weight="bold" style:font-name-asian="Garamond2" style:font-size-asian="20pt" style:font-style-asian="normal" style:font-weight-asian="bold" style:font-name-complex="Garamond2" style:font-size-complex="20pt" style:font-style-complex="normal" style:font-weight-complex="bold"/>
    </style:style>
    <style:style style:name="T10" style:family="text">
      <style:text-properties officeooo:rsid="001ec843"/>
    </style:style>
    <style:style style:name="T11" style:family="text">
      <style:text-properties officeooo:rsid="0019e63c"/>
    </style:style>
    <style:style style:name="T12" style:family="text">
      <style:text-properties style:font-name="Garamond" fo:font-size="12pt" fo:font-style="italic" style:font-name-asian="Garamond2" style:font-size-asian="12pt" style:font-style-asian="italic" style:font-name-complex="Garamond2" style:font-size-complex="12pt" style:font-style-complex="italic"/>
    </style:style>
    <style:style style:name="T13" style:family="text">
      <style:text-properties style:font-name="Garamond" fo:font-size="12pt" fo:font-style="italic" fo:font-weight="bold" style:font-name-asian="Garamond2" style:font-size-asian="12pt" style:font-style-asian="italic" style:font-weight-asian="bold" style:font-name-complex="Garamond2" style:font-size-complex="12pt" style:font-style-complex="italic" style:font-weight-complex="bold"/>
    </style:style>
    <style:style style:name="T14" style:family="text">
      <style:text-properties style:font-name="Garamond" fo:font-size="12pt" officeooo:rsid="0020e75f" style:font-name-asian="Garamond2" style:font-size-asian="12pt" style:font-name-complex="Garamond2" style:font-size-complex="12pt"/>
    </style:style>
    <style:style style:name="T15" style:family="text">
      <style:text-properties style:font-name="Garamond" fo:font-size="18pt" fo:font-style="normal" fo:font-weight="bold" style:font-name-asian="Garamond2" style:font-size-asian="18pt" style:font-style-asian="normal" style:font-weight-asian="bold" style:font-name-complex="Garamond2" style:font-size-complex="18pt" style:font-style-complex="normal" style:font-weight-complex="bold"/>
    </style:style>
    <style:style style:name="T16" style:family="text">
      <style:text-properties style:font-name="Garamond" fo:font-size="20pt" fo:font-style="italic" fo:font-weight="normal" style:font-name-asian="Garamond2" style:font-size-asian="20pt" style:font-style-asian="italic" style:font-weight-asian="normal" style:font-name-complex="Garamond2" style:font-size-complex="20pt" style:font-style-complex="italic" style:font-weight-complex="normal"/>
    </style:style>
    <style:style style:name="T17" style:family="text">
      <style:text-properties style:font-name="Garamond" fo:font-size="12pt" officeooo:rsid="0025d1ce" style:font-name-asian="Garamond2" style:font-size-asian="12pt" style:font-name-complex="Garamond2" style:font-size-complex="12pt"/>
    </style:style>
    <style:style style:name="T18" style:family="text">
      <style:text-properties style:font-name="Garamond" fo:font-size="12pt" officeooo:rsid="000ef0a2" style:font-name-asian="Garamond2" style:font-size-asian="12pt" style:font-name-complex="Garamond2" style:font-size-complex="12pt"/>
    </style:style>
    <style:style style:name="T19" style:family="text">
      <style:text-properties style:font-name="Garamond" fo:font-size="12pt" officeooo:rsid="000aa914" style:font-name-asian="Garamond2" style:font-size-asian="12pt" style:font-name-complex="Garamond2" style:font-size-complex="12pt"/>
    </style:style>
    <style:style style:name="T20" style:family="text">
      <style:text-properties style:font-name="Garamond" fo:font-size="12pt" officeooo:rsid="0019e63c" style:font-name-asian="Garamond2" style:font-size-asian="12pt" style:font-name-complex="Garamond2" style:font-size-complex="12pt"/>
    </style:style>
    <style:style style:name="T21" style:family="text">
      <style:text-properties style:font-name="Garamond" fo:font-size="12pt" officeooo:rsid="001b0d21" style:font-name-asian="Garamond2" style:font-size-asian="12pt" style:font-name-complex="Garamond2" style:font-size-complex="12pt"/>
    </style:style>
    <style:style style:name="T22" style:family="text">
      <style:text-properties style:font-name="Garamond" fo:font-size="12pt" officeooo:rsid="0010c18f" style:font-name-asian="Garamond2" style:font-size-asian="12pt" style:font-name-complex="Garamond2" style:font-size-complex="12pt"/>
    </style:style>
    <style:style style:name="T23" style:family="text">
      <style:text-properties style:font-name="Garamond" fo:font-size="12pt" officeooo:rsid="001c3fc8" style:font-name-asian="Garamond2" style:font-size-asian="12pt" style:font-name-complex="Garamond2" style:font-size-complex="12pt"/>
    </style:style>
    <style:style style:name="T24" style:family="text">
      <style:text-properties style:font-name="Garamond" fo:font-size="12pt" officeooo:rsid="0012682e" style:font-name-asian="Garamond2" style:font-size-asian="12pt" style:font-name-complex="Garamond2" style:font-size-complex="12pt"/>
    </style:style>
    <style:style style:name="T25" style:family="text">
      <style:text-properties style:font-name="Garamond" fo:font-size="12pt" officeooo:rsid="00129f55" style:font-name-asian="Garamond2" style:font-size-asian="12pt" style:font-name-complex="Garamond2" style:font-size-complex="12pt"/>
    </style:style>
    <style:style style:name="T26" style:family="text">
      <style:text-properties style:font-name="Garamond" fo:font-size="12pt" officeooo:rsid="001ca345" style:font-name-asian="Garamond2" style:font-size-asian="12pt" style:font-name-complex="Garamond2" style:font-size-complex="12pt"/>
    </style:style>
    <style:style style:name="T27" style:family="text">
      <style:text-properties style:font-name="Garamond" fo:font-size="12pt" officeooo:rsid="00147707" style:font-name-asian="Garamond2" style:font-size-asian="12pt" style:font-name-complex="Garamond2" style:font-size-complex="12pt"/>
    </style:style>
    <style:style style:name="T28" style:family="text">
      <style:text-properties style:font-name="Garamond" fo:font-size="12pt" officeooo:rsid="00274e7d" style:font-name-asian="Garamond2" style:font-size-asian="12pt" style:font-name-complex="Garamond2" style:font-size-complex="12pt"/>
    </style:style>
    <style:style style:name="T29" style:family="text">
      <style:text-properties style:font-name="Garamond" fo:font-size="12pt" officeooo:rsid="001e1e8f" style:font-name-asian="Garamond2" style:font-size-asian="12pt" style:font-name-complex="Garamond2" style:font-size-complex="12pt"/>
    </style:style>
    <style:style style:name="T30" style:family="text">
      <style:text-properties style:font-name="Garamond" fo:font-size="12pt" officeooo:rsid="000ad788" style:font-name-asian="Garamond2" style:font-size-asian="12pt" style:font-name-complex="Garamond2" style:font-size-complex="12pt"/>
    </style:style>
    <style:style style:name="T31" style:family="text">
      <style:text-properties style:font-name="Garamond" fo:font-size="12pt" officeooo:rsid="00162aa5" style:font-name-asian="Garamond2" style:font-size-asian="12pt" style:font-name-complex="Garamond2" style:font-size-complex="12pt"/>
    </style:style>
    <style:style style:name="T32" style:family="text">
      <style:text-properties style:font-name="Garamond" fo:font-size="12pt" fo:font-weight="normal" style:font-name-asian="Garamond2" style:font-size-asian="12pt" style:font-weight-asian="normal" style:font-name-complex="Garamond2" style:font-size-complex="12pt" style:font-weight-complex="normal"/>
    </style:style>
    <style:style style:name="T33" style:family="text">
      <style:text-properties style:font-name="Garamond" fo:font-size="12pt" officeooo:rsid="00181a34" style:font-name-asian="Garamond2" style:font-size-asian="12pt" style:font-name-complex="Garamond2" style:font-size-complex="12pt"/>
    </style:style>
    <style:style style:name="T34" style:family="text">
      <style:text-properties style:font-name="Garamond" fo:font-size="12pt" officeooo:rsid="000c6574" style:font-name-asian="Garamond2" style:font-size-asian="12pt" style:font-name-complex="Garamond2" style:font-size-complex="12pt"/>
    </style:style>
    <style:style style:name="T35" style:family="text">
      <style:text-properties style:font-name="Garamond" fo:font-size="12pt" officeooo:rsid="00282a38" style:font-name-asian="Garamond2" style:font-size-asian="12pt" style:font-name-complex="Garamond2" style:font-size-complex="12pt"/>
    </style:style>
    <style:style style:name="T36" style:family="text">
      <style:text-properties officeooo:rsid="001e1e8f"/>
    </style:style>
    <style:style style:name="T37" style:family="text">
      <style:text-properties officeooo:rsid="001e5435"/>
    </style:style>
    <style:style style:name="T38" style:family="text">
      <style:text-properties style:font-name="Garamond" fo:font-size="12pt" officeooo:rsid="000ee111" style:font-name-asian="Garamond2" style:font-size-asian="12pt" style:font-name-complex="Garamond2" style:font-size-complex="12pt"/>
    </style:style>
    <style:style style:name="T39" style:family="text">
      <style:text-properties style:font-name="Garamond" fo:font-size="12pt" officeooo:rsid="000ceef4" style:font-name-asian="Garamond2" style:font-size-asian="12pt" style:font-name-complex="Garamond2" style:font-size-complex="12pt"/>
    </style:style>
    <style:style style:name="T40" style:family="text">
      <style:text-properties style:font-name="Garamond" fo:font-size="12pt" officeooo:rsid="001e5435" style:font-name-asian="Garamond2" style:font-size-asian="12pt" style:font-name-complex="Garamond2" style:font-size-complex="12pt"/>
    </style:style>
    <style:style style:name="T41" style:family="text">
      <style:text-properties style:font-name="Garamond" fo:font-size="12pt" officeooo:rsid="001857dd" style:font-name-asian="Garamond2" style:font-size-asian="12pt" style:font-name-complex="Garamond2" style:font-size-complex="12pt"/>
    </style:style>
    <style:style style:name="T42" style:family="text">
      <style:text-properties style:font-name="Garamond" fo:font-size="16pt" fo:font-style="normal" fo:font-weight="normal" style:font-name-asian="Garamond2" style:font-size-asian="16pt" style:font-style-asian="normal" style:font-weight-asian="normal" style:font-name-complex="Garamond2" style:font-size-complex="16pt" style:font-style-complex="normal" style:font-weight-complex="normal"/>
    </style:style>
    <style:style style:name="T43" style:family="text">
      <style:text-properties style:font-name="Garamond" fo:font-size="14pt" fo:font-style="normal" fo:font-weight="bold" style:font-name-asian="Garamond2" style:font-size-asian="14pt" style:font-style-asian="normal" style:font-weight-asian="bold" style:font-name-complex="Garamond2" style:font-size-complex="14pt" style:font-style-complex="normal" style:font-weight-complex="bold"/>
    </style:style>
    <style:style style:name="T44" style:family="text">
      <style:text-properties style:font-name="Garamond" fo:font-size="12pt" fo:font-style="normal" fo:font-weight="bold" style:font-name-asian="Garamond2" style:font-size-asian="12pt" style:font-style-asian="normal" style:font-weight-asian="bold" style:font-name-complex="Garamond2" style:font-size-complex="12pt" style:font-style-complex="normal" style:font-weight-complex="bold"/>
    </style:style>
    <style:style style:name="T45" style:family="text">
      <style:text-properties style:font-name="Garamond" fo:font-size="12pt" fo:font-style="normal" fo:font-weight="normal" style:font-name-asian="Garamond2" style:font-size-asian="12pt" style:font-style-asian="normal" style:font-weight-asian="normal" style:font-name-complex="Garamond2" style:font-size-complex="12pt" style:font-style-complex="normal" style:font-weight-complex="normal"/>
    </style:style>
    <style:style style:name="T46" style:family="text">
      <style:text-properties style:font-name="Garamond" fo:font-size="14pt" fo:font-style="italic" fo:font-weight="normal" style:font-name-asian="Garamond2" style:font-size-asian="14pt" style:font-style-asian="italic" style:font-weight-asian="normal" style:font-name-complex="Garamond2" style:font-size-complex="14pt"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We’re Naked!</text:span></text:p>
      <text:p text:style-name="P3"/>
      <text:p text:style-name="P2"><text:span text:style-name="T2">A Rapture in Three Acts</text:span></text:p>
      <text:p text:style-name="P4"/>
      <text:p text:style-name="P5"><text:span text:style-name="T3">by ChefMyKLove</text:span></text:p>
      <text:p text:style-name="Standard"/>
      <text:p text:style-name="P6"/>
      <text:p text:style-name="P2"><text:span text:style-name="T4">© 2026 ChefMyKLove</text:span></text:p>
      <text:p text:style-name="P2"><text:span text:style-name="T4">All rights reserved.</text:span></text:p>
      <text:p text:style-name="P7"/>
      <text:p text:style-name="P2"><text:span text:style-name="T4">No part of this publication may be reproduced or transmitted</text:span></text:p>
      <text:p text:style-name="P2"><text:span text:style-name="T4">in any form without written permission from the author.</text:span></text:p>
      <text:p text:style-name="P7"/>
      <text:p text:style-name="P2"><text:span text:style-name="T4">Published by ChefMyKLove</text:span></text:p>
      <text:p text:style-name="P2"><text:span text:style-name="T4">chefmyklove.com</text:span></text:p>
      <text:p text:style-name="P7"/>
      <text:p text:style-name="P2"><text:span text:style-name="T4">ISBN: 978-1-0673516-0-1</text:span></text:p>
      <text:p text:style-name="P7"/>
      <text:p text:style-name="P2"><text:span text:style-name="T4">First Edition, 2026</text:span></text:p>
      <text:p text:style-name="Standard"/>
      <text:p text:style-name="P8"/>
      <text:p text:style-name="P9"><text:span text:style-name="T5">On the morning of the day of the Apocalypse,</text:span></text:p>
      <text:p text:style-name="P9"><text:span text:style-name="T5">Willy woke up</text:span></text:p>
      <text:p text:style-name="P9"><text:span text:style-name="T5">and made himself bacon and eggs and rye toast…</text:span></text:p>
      <text:p text:style-name="P7"/>
      <text:p text:style-name="P5"><text:span text:style-name="T4">— “The Story of Willy,” King Missile</text:span></text:p>
      <text:p text:style-name="Standard"/>
      <text:p text:style-name="P10"/>
      <text:p text:style-name="P5"><text:span text:style-name="T6">Contents</text:span></text:p>
      <text:p text:style-name="P4"/>
      <text:p text:style-name="P5"><text:span text:style-name="T7">Part One: The Waking</text:span></text:p>
      <text:p text:style-name="P3"/>
      <text:p text:style-name="P5"><text:span text:style-name="T7">Part Two: The Dreaming</text:span></text:p>
      <text:p text:style-name="P3"/>
      <text:p text:style-name="P5"><text:span text:style-name="T7">Part Three: The Settling</text:span></text:p>
      <text:p text:style-name="Standard"/>
      <text:h text:style-name="P11" text:outline-level="1"><text:span text:style-name="T8">Part One: The Waking</text:span></text:h>
      <text:p text:style-name="P12"><text:span text:style-name="T3">…This morning,</text:span></text:p>
      <text:p text:style-name="P7"/>
      <text:p text:style-name="P13"><text:span text:style-name="T3">you roll softly from your well-slumbered sleep-space, reach out with that searching, delicately busy hand, to touch me softly on the shoulder, then the face, just like I’d imagined it would happen…</text:span></text:p>
      <text:p text:style-name="P7"/>
      <text:p text:style-name="P13"><text:span text:style-name="T3">I’m certain that I smiled.</text:span></text:p>
      <text:p text:style-name="P7"/>
      <text:p text:style-name="P14">I awaken happy and filled with the sound of your hearty giggles summoning your bliss… like you can’t quite contain the joy of being alive right now in this room this morning, with me. </text:p>
      <text:p text:style-name="P14"/>
      <text:p text:style-name="P14">Stirring, still smiling, I watch as the covers fly away and—</text:p>
      <text:p text:style-name="P7"/>
      <text:p text:style-name="P5"><text:span text:style-name="T9">WE’RE NAKED!</text:span></text:p>
      <text:p text:style-name="P5"><text:span text:style-name="T9">SUCH morning! and a WHOLE day ahead.</text:span></text:p>
      <text:p text:style-name="P5"><text:span text:style-name="T9">WE’RE NAKED!</text:span></text:p>
      <text:p text:style-name="P7"/>
      <text:p text:style-name="P15"><text:soft-page-break/>—I jump up quick to win the race to the toilet but you’re faster. <text:span text:style-name="T10">Y</text:span>ou’ve been awake longer, and I’m still dreaming, still moving through that otherworldly <text:span text:style-name="T11">sp</text:span>ace, even as my feet find the floor and shuffle over to the table by the sink, where there’s a joint already rolled, some water in a glass with that slice of sunlight searing through it: spreading its subtle spectral hues onto the old tapedeck. </text:p>
      <text:p text:style-name="P15"/>
      <text:p text:style-name="P15">There’s a lighter and a candle too: the whole ritual of our waking laid out like an altar for us… ready for me to curate the mood while waiting on you to finish up on the head: fumbling fingers find the well-worn play button and my anticipatory soul waits for the room to fill with the flurry of something old, something we both knew by heart before we’d ever even met…</text:p>
      <text:p text:style-name="P7"/>
      <text:p text:style-name="P12"><text:span text:style-name="T3">“Don’t you DARE light that joint ‘till I’m done peeing,” you laugh from your throne…</text:span></text:p>
      <text:p text:style-name="P13"><text:span text:style-name="T3">“Are you almost done peeing?”</text:span></text:p>
      <text:p text:style-name="P13"><text:span text:style-name="T3">“Yeah.”</text:span></text:p>
      <text:p text:style-name="P13"><text:span text:style-name="T3">“I’m lighting it. First toke, my turn today, Love.”</text:span></text:p>
      <text:p text:style-name="P7"/>
      <text:p text:style-name="P12"><text:span text:style-name="T12">…click…</text:span></text:p>
      <text:p text:style-name="P12"><text:span text:style-name="T12">…fssschhh.</text:span></text:p>
      <text:p text:style-name="P7"/>
      <text:p text:style-name="P13"><text:soft-page-break/><text:span text:style-name="T3">…“Good morning! Good morning!” It’s the Beatles, they’re making their noise as that chillin’ cannabis flower smoke drifts softly into the air. I hand off the spliff as you leap from the bathroom to grab it with grace, while I urgently take my place on the potty with pleasure to release with pleasure the stored liquid of a night full of dreaming.</text:span></text:p>
      <text:p text:style-name="P7"/>
      <text:p text:style-name="P12"><text:span text:style-name="T13">Yeah.</text:span><text:span text:style-name="T12"> You know how that goes….</text:span></text:p>
      <text:p text:style-name="P7"/>
      <text:p text:style-name="P13"><text:span text:style-name="T3">“Yeah… I had a wild dream just now,” I call through the always open bathroom doorway.</text:span></text:p>
      <text:p text:style-name="P7"/>
      <text:p text:style-name="P13"><text:span text:style-name="T3">“Prophetic?” Your voice comes back, already curious about what my sleeping mind could have possibly conjured.</text:span></text:p>
      <text:p text:style-name="P7"/>
      <text:p text:style-name="P13"><text:span text:style-name="T3">“No, I don’t think so. I don’t know though. Maybe.” The sweet smoke </text:span><text:span text:style-name="T14">swirls</text:span><text:span text:style-name="T3"> toward me from the main room.</text:span></text:p>
      <text:p text:style-name="P7"/>
      <text:p text:style-name="P13"><text:span text:style-name="T3">“Tell me.”</text:span></text:p>
      <text:p text:style-name="P7"/>
      <text:p text:style-name="P13"><text:span text:style-name="T3">“Let me get off the can first. Can I get a toke?”</text:span></text:p>
      <text:p text:style-name="P7"/>
      <text:p text:style-name="P13"><text:soft-page-break/><text:span text:style-name="T3">“Here—” you’re already there, passing it to me like we’ve communed in this way a thousand thousand times, like our bodies know this language older than words. “Do you want to take a shower?”</text:span></text:p>
      <text:p text:style-name="P7"/>
      <text:p text:style-name="P13"><text:span text:style-name="T3">“No, not now. Um. I want to sit by the window.”</text:span></text:p>
      <text:p text:style-name="P7"/>
      <text:p text:style-name="P13"><text:span text:style-name="T3">I hop from the toilet and grab the blanket from the bed on my way to the sliding-doors window. It’s that blanket you know, that’s been around here forever and seen better days but still holds the warmth of our last night’s slumber; the smell of us.</text:span></text:p>
      <text:p text:style-name="P7"/>
      <text:p text:style-name="P13"><text:span text:style-name="T3">“What are you doing?” you ask, and there’s something in your voice like I’ve genuinely stumped you, or maybe it’s that you already know. Maybe you’re waiting to see if I’ll actually say it… Maybe you were there this morning, dreaming it too…</text:span></text:p>
      <text:p text:style-name="P7"/>
      <text:p text:style-name="P13"><text:span text:style-name="T3">“Do we have any really dusty powder?”</text:span></text:p>
      <text:p text:style-name="P7"/>
      <text:p text:style-name="P13"><text:span text:style-name="T3">You’re quick, “There’s the dust in the bag in the vacuum in the closet. I’ll get it!” Barely missing a beat.</text:span></text:p>
      <text:p text:style-name="P7"/>
      <text:p text:style-name="P13"><text:soft-page-break/><text:span text:style-name="T3">I place the blanket on the heater by the door, turn around and—</text:span></text:p>
      <text:p text:style-name="P7"/>
      <text:p text:style-name="P5"><text:span text:style-name="T15">YOU’RE NAKED! I’M NAKED! WE’RE NAKED!</text:span></text:p>
      <text:p text:style-name="P7"/>
      <text:p text:style-name="P13"><text:span text:style-name="T3">—and the morning light catches your skin in a way that makes my chest do something complicated. You smile excitedly while you hand me the dust and I hand back the doobie.</text:span></text:p>
      <text:p text:style-name="P7"/>
      <text:p text:style-name="P13"><text:span text:style-name="T3">I open the door to the third-floor balcony and this sunny Saturday summer morning pouring in. The air smells like ripe possibility. Like the city breathing in its weekend sigh. Like it had no idea what was about to happen…</text:span></text:p>
      <text:p text:style-name="Standard"/>
      <text:h text:style-name="P11" text:outline-level="1"><text:span text:style-name="T8">Part Two: The Dreaming</text:span></text:h>
      <text:p text:style-name="P12"><text:span text:style-name="T3">“It’s certainly not the weather of my dream,” I say, looking out at the crisp blue sky. “Shit. Where’s the fan?”</text:span></text:p>
      <text:p text:style-name="P7"/>
      <text:p text:style-name="P13"><text:span text:style-name="T3">The fan’s in the closet. I run quickly to get it, then stop where you’re standing—to kiss-kiss you, a kiss-kissy-kiss. You kiss-kissy-kiss me right back, put the joint in my mouth, and start the fan up on</text:span></text:p>
      <text:p text:style-name="P7"/>
      <text:p text:style-name="P5"><text:span text:style-name="T16">……………High……………</text:span></text:p>
      <text:p text:style-name="P7"/>
      <text:p text:style-name="P13"><text:span text:style-name="T3">The blades start to spin and so I begin:</text:span></text:p>
      <text:p text:style-name="P7"/>
      <text:p text:style-name="P13"><text:span text:style-name="T3">“Before anything else, there was this: we were at a huge party being thrown in Central Park in New York City. The entire park, you understand? Packed with people! This wasn’t a normal party—it was a celebration. A celebration of the day of the </text:span><text:span text:style-name="T17">a</text:span><text:span text:style-name="T3">pocalypse.”</text:span></text:p>
      <text:p text:style-name="P7"/>
      <text:p text:style-name="P13"><text:span text:style-name="T3">I pause. You’re watching me. The </text:span><text:span text:style-name="T18">bag of </text:span><text:span text:style-name="T3">dust in my hands </text:span><text:span text:style-name="T18">is open</text:span><text:span text:style-name="T3"> now, waiting.</text:span></text:p>
      <text:p text:style-name="P7"/>
      <text:p text:style-name="P13"><text:soft-page-break/><text:span text:style-name="T3">“Everyone in the park. Bands playing on a big stage, people dancing, people drinking and people touching each other… Like I mean really touching each other: strangers engaging together and embracing the way you do when you know nothing matters anymore; when the usual social norms and distances just… dissolve.</text:span></text:p>
      <text:p text:style-name="P7"/>
      <text:p text:style-name="P13"><text:span text:style-name="T3">And there was </text:span><text:span text:style-name="T19">a</text:span><text:span text:style-name="T3"> famous MC, this guy who kept coming on between performance sets; sets that never quite </text:span><text:span text:style-name="T19">seemed like they even </text:span><text:span text:style-name="T3">started or ended, though we were all bopping around to whatever </text:span><text:span text:style-name="T20">different </text:span><text:span text:style-name="T3">sound was found. The MC was saying things like ‘Great to be here all together, isn’t it?’ and ‘Okay folks, we’ve got forty-nine minutes to be alive like this,’ and ‘Isn’t it something?! Something so special that we get to spend these final moments together?’”</text:span></text:p>
      <text:p text:style-name="P7"/>
      <text:p text:style-name="P12"><text:span text:style-name="T12">The fan hums.</text:span></text:p>
      <text:p text:style-name="P7"/>
      <text:p text:style-name="P13"><text:span text:style-name="T3">“We partied and partied like it was the end of the world. Because it was. Not a care in the world, you understand? That kind of care just… stopped mattering. We all moved into a different way of being </text:span><text:span text:style-name="T18">with each other</text:span><text:span text:style-name="T3">. There was reverence, </text:span><text:span text:style-name="T21">but not the kind that comes out of a sense of duty or dogma</text:span><text:span text:style-name="T3">. The </text:span><text:soft-page-break/><text:span text:style-name="T3">kind </text:span><text:span text:style-name="T21">that sprouts from pure awe! <text:s/>W</text:span><text:span text:style-name="T3">here you’re dancing and crying and laughing all at the same time </text:span><text:span text:style-name="T21">in</text:span><text:span text:style-name="T3"> REJOICE!!”</text:span></text:p>
      <text:p text:style-name="P7"/>
      <text:p text:style-name="P13"><text:span text:style-name="T3">I’m speaking faster now, the dream pulling at me, pulling me back into it and I feel how eager you are </text:span><text:span text:style-name="T22">too</text:span><text:span text:style-name="T3">. How you’d go right back there with me if we could… </text:span><text:span text:style-name="T19">right back </text:span><text:span text:style-name="T3">to </text:span><text:span text:style-name="T23">moment of </text:span><text:span text:style-name="T3">the end of the world.</text:span></text:p>
      <text:p text:style-name="P7"/>
      <text:p text:style-name="P16"><text:span text:style-name="T3">“As we partied we shed all of the hangups until we </text:span><text:span text:style-name="T24">were dancing</text:span><text:span text:style-name="T3"> ‘naked’ and together all as one. Everyone was. We all just… shed that society stuff… Th</text:span><text:span text:style-name="T24">at</text:span><text:span text:style-name="T3"> pretense, </text:span><text:span text:style-name="T24">that</text:span><text:span text:style-name="T3"> worry about what anyone thought…. Some even lost their clothes!! </text:span></text:p>
      <text:p text:style-name="P17"/>
      <text:p text:style-name="P16"><text:span text:style-name="T3">And the MC came on again—this was later, this was close—and told us ‘Two minutes to go!’ And we all quietly counted down together, </text:span><text:span text:style-name="T19">watching the sky... </text:span><text:span text:style-name="T3">and this is where it felt odd to me. We all noticed </text:span><text:span text:style-name="T19">the </text:span><text:span text:style-name="T3">smoke trails. Missiles. Over the city. Over the park, </text:span><text:span text:style-name="T19">and we were all j</text:span><text:span text:style-name="T3">ust… there. </text:span><text:span text:style-name="T19">It didnt matter that they were coming or that they were</text:span><text:span text:style-name="T3"> coming right down upon us.”</text:span></text:p>
      <text:p text:style-name="P7"/>
      <text:p text:style-name="P13"><text:span text:style-name="T3">Your hand finds my shoulder. I don’t stop.</text:span></text:p>
      <text:p text:style-name="P7"><text:soft-page-break/></text:p>
      <text:p text:style-name="P18"><text:span text:style-name="T3">“But it wasn’t scary in the way you’d think. There was no panic in the scene at all. We knew that this was </text:span><text:span text:style-name="T25">exactly </text:span><text:span text:style-name="T3">why we were </text:span><text:span text:style-name="T25">all </text:span><text:span text:style-name="T3">here. It was like… we’d already accepted it? Like we’d spen</text:span><text:span text:style-name="T25">t </text:span><text:span text:style-name="T3">those last special minutes </text:span><text:span text:style-name="T25">together </text:span><text:span text:style-name="T3">coming to terms </text:span><text:span text:style-name="T25">en masse </text:span><text:span text:style-name="T3">with something we couldn’t change, so when the actual moment arrived, we were ready. We were together. The countdown reached zero and then—”</text:span></text:p>
      <text:p text:style-name="P7"/>
      <text:p text:style-name="P13"><text:span text:style-name="T3">I </text:span><text:span text:style-name="T19">throw </text:span><text:span text:style-name="T3">open </text:span><text:span text:style-name="T19">the bag I am holding. Y</text:span><text:span text:style-name="T3">ou point the fan at me smiling and th</text:span><text:span text:style-name="T25">at</text:span><text:span text:style-name="T3"> dust starts-a-flying. All around, all around, </text:span><text:span text:style-name="T19">o</text:span><text:span text:style-name="T3">utside and in, it covers the Lovers and the room that </text:span></text:p>
      <text:p text:style-name="P19">WE’RE NAKED!</text:p>
      <text:p text:style-name="P20"><text:s/>in.</text:p>
      <text:p text:style-name="P7"/>
      <text:p text:style-name="P13"><text:span text:style-name="T3">The sunlight through the window catches it, and for </text:span><text:span text:style-name="T25">a fraction of an instant </text:span><text:span text:style-name="T3">it looks like </text:span><text:span text:style-name="T26">we created </text:span><text:span text:style-name="T3">somethin</text:span><text:span text:style-name="T19">g </text:span><text:span text:style-name="T3">sacred </text:span><text:span text:style-name="T26">and not just something I’d have to clean up later</text:span><text:span text:style-name="T3">. <text:s/></text:span><text:span text:style-name="T26">Like we were having a little mini communion with the dreamscape aether.</text:span></text:p>
      <text:p text:style-name="P7"/>
      <text:p text:style-name="P13"><text:span text:style-name="T3">“Do you see the way it’s swirling around?” I ask, and my voice sounds younger than I am. </text:span><text:span text:style-name="T25">It s</text:span><text:span text:style-name="T3">ounds like </text:span><text:soft-page-break/><text:span text:style-name="T25">the voice of </text:span><text:span text:style-name="T3">the </text:span><text:span text:style-name="T19">little </text:span><text:span text:style-name="T3">kid </text:span><text:span text:style-name="T19">that day </text:span><text:span text:style-name="T3">in the park who was unsure </text:span><text:span text:style-name="T25">of </text:span><text:span text:style-name="T3">how to ask you if you wanted to play.</text:span></text:p>
      <text:p text:style-name="P7"/>
      <text:p text:style-name="P13"><text:span text:style-name="T3">“Yes,” you say. You’re watching the dust, but you’re also watching me.</text:span></text:p>
      <text:p text:style-name="P7"/>
      <text:p text:style-name="P13"><text:span text:style-name="T3">“Imagine it to be a cloudy day, not bright like today,” I say slowly, “and there was </text:span><text:span text:style-name="T26">all </text:span><text:span text:style-name="T3">this swirling around, and we didn’t have these walls. </text:span><text:span text:style-name="T19">We’re suspended on the</text:span><text:span text:style-name="T3"> thin air around us. Only dust, like this, swirling all about.”</text:span></text:p>
      <text:p text:style-name="P7"/>
      <text:p text:style-name="P13"><text:span text:style-name="T25">You’re amusedly confused as I</text:span><text:span text:style-name="T3">’m </text:span><text:span text:style-name="T25">aware of the absurdity of me </text:span><text:span text:style-name="T3">trying to describe </text:span><text:span text:style-name="T25">this</text:span><text:span text:style-name="T3"> indescribable sensation, </text:span><text:span text:style-name="T25">with a bag of dust and a fan. <text:s/>T</text:span><text:span text:style-name="T3">he </text:span><text:span text:style-name="T25">bizarre </text:span><text:span text:style-name="T3">bliss of that dream: Trying to describe that sense of being held by something so comprehensive that it includes everything all at once, ending and continuing communally, eternally.</text:span></text:p>
      <text:p text:style-name="P7"/>
      <text:p text:style-name="P13"><text:span text:style-name="T3">“Come, sit on the heater,” I say.</text:span></text:p>
      <text:p text:style-name="P7"/>
      <text:p text:style-name="P13"><text:span text:style-name="T3">You move toward me. The dust is still </text:span><text:span text:style-name="T19">swirling</text:span><text:span text:style-name="T3">, caught in the fan’s artificial wind, dancing between the kitchen and the window, between the inside and </text:span><text:soft-page-break/><text:span text:style-name="T3">the outside. It settles on your </text:span><text:span text:style-name="T27">face, </text:span><text:span text:style-name="T3">on your shoulders <text:s/>in your hair. It settles on mine. We’re becoming </text:span><text:span text:style-name="T28">covered in </text:span><text:span text:style-name="T3">this dust </text:span><text:span text:style-name="T28">while you’re </text:span><text:span text:style-name="T3">hold</text:span><text:span text:style-name="T28">ing</text:span><text:span text:style-name="T3"> onto the moment of </text:span><text:span text:style-name="T28">trying to understand my wacky morning dream.</text:span></text:p>
      <text:p text:style-name="P7"/>
      <text:p text:style-name="P13"><text:span text:style-name="T3">“Masses of swirling dust carried all of us, and everything else away. Not violently. Not in a way that hurt </text:span><text:span text:style-name="T27">but in</text:span><text:span text:style-name="T3"> a totally pleasant fashion. Gentle, almost. Like being held by something </text:span><text:span text:style-name="T29">so </text:span><text:span text:style-name="T3">vast and indifferent and somehow still </text:span><text:span text:style-name="T29">SO L</text:span><text:span text:style-name="T3">oving. Like the universe’s way of saying ‘</text:span><text:span text:style-name="T27">W</text:span><text:span text:style-name="T3">elcome </text:span><text:span text:style-name="T30">home’</text:span><text:span text:style-name="T3">.”</text:span></text:p>
      <text:p text:style-name="P7"/>
      <text:p text:style-name="P13"><text:span text:style-name="T3">“It’s really dusty,” you say, and laugh a little.</text:span></text:p>
      <text:p text:style-name="P7"/>
      <text:p text:style-name="P13"><text:span text:style-name="T3">“It’s quite an effective effect,” I say, and I’m not </text:span><text:span text:style-name="T31">only</text:span><text:span text:style-name="T3"> talking about the dust:</text:span></text:p>
      <text:p text:style-name="P7"/>
      <text:p text:style-name="P13"><text:span text:style-name="T3">I’m talking about all of th</text:span><text:span text:style-name="T31">e </text:span><text:span text:style-name="T3">the </text:span><text:span text:style-name="T30">magic of this </text:span><text:span text:style-name="T3">morning <text:s/></text:span></text:p>
      <text:p text:style-name="P21">WE’RE NAKED!</text:p>
      <text:p text:style-name="P22"><text:span text:style-name="T31">together in. <text:s/>T</text:span><text:span text:style-name="T3">he way your dusty body looks in </text:span><text:span text:style-name="T12">THIS dreamy light</text:span><text:span text:style-name="T3">. </text:span></text:p>
      <text:p text:style-name="P23"/>
      <text:p text:style-name="P22"><text:span text:style-name="T3">The fact that </text:span><text:span text:style-name="T31">all of this is impermanent</text:span><text:span text:style-name="T3">… if it ever </text:span><text:span text:style-name="T31">was </text:span><text:span text:style-name="T3">even real. That </text:span><text:span text:style-name="T32">WE</text:span><text:span text:style-name="T3"> </text:span><text:span text:style-name="T31">can’t possibly last --</text:span><text:span text:style-name="T3">not like </text:span><text:soft-page-break/><text:span text:style-name="T3">this. That the dust will settle and the day will come </text:span><text:span text:style-name="T31">where </text:span><text:span text:style-name="T3">eventually the world will end in some way or another, and none of it will have mattered in the way we think it matters. <text:s/></text:span></text:p>
      <text:p text:style-name="P24"><text:span text:style-name="T3"/></text:p>
      <text:p text:style-name="P22"><text:span text:style-name="T31">The things that we cherish over a lifetime become as fleeting as a moment in Love. Or the breaths that Lovers breathe together.</text:span></text:p>
      <text:p text:style-name="P7"/>
      <text:p text:style-name="P12"><text:span text:style-name="T12">The fan still hums.</text:span></text:p>
      <text:p text:style-name="P7"/>
      <text:p text:style-name="P22"><text:span text:style-name="T3">“But here’s the thing: </text:span><text:span text:style-name="T28">we </text:span><text:span text:style-name="T3">still hung out </text:span><text:span text:style-name="T29">and partied on!</text:span><text:span text:style-name="T3"> We were </text:span><text:span text:style-name="T29">together </text:span><text:span text:style-name="T3">in the dust, and we couldn’t see each other for all of it swirling around, but we could feel each other </text:span><text:span text:style-name="T29">vibing, you know?</text:span><text:span text:style-name="T3"> <text:s/></text:span><text:span text:style-name="T30">Such strange truncated immediacy.</text:span><text:span text:style-name="T3"> <text:s/></text:span><text:span text:style-name="T31">Through it we were all expressing this collective awe with what w</text:span><text:span text:style-name="T29">as</text:span><text:span text:style-name="T31"> going on.</text:span></text:p>
      <text:p text:style-name="P24"><text:s/></text:p>
      <text:p text:style-name="P22"><text:span text:style-name="T28">W</text:span><text:span text:style-name="T3">e were all saying things like ‘Wow, this is a</text:span><text:span text:style-name="T28">ll</text:span><text:span text:style-name="T3"> pretty weird’, </text:span><text:span text:style-name="T30">or ‘</text:span><text:span text:style-name="T29">I</text:span><text:span text:style-name="T3">nteresting sensation!’ and ‘Not at all what I expected’, </text:span><text:span text:style-name="T31">T</text:span><text:span text:style-name="T3">here was this tone—this feeling—that was almost… grateful? Groovy </text:span><text:span text:style-name="T28">is </text:span><text:span text:style-name="T3">the word my dream-self kept thinking. ‘Ohhh yeahhhh!.’”</text:span></text:p>
      <text:p text:style-name="P7"/>
      <text:p text:style-name="P25"><text:span text:style-name="T3"><text:tab/>I look at you. <text:s/></text:span><text:span text:style-name="T28">I’m s</text:span><text:span text:style-name="T30">miling, while still </text:span><text:span text:style-name="T33">living </text:span><text:span text:style-name="T30">fondly </text:span><text:span text:style-name="T33">in</text:span><text:span text:style-name="T30"> <text:tab/>that deep</text:span><text:span text:style-name="T28">ly</text:span><text:span text:style-name="T30"> </text:span><text:span text:style-name="T33">engrossing </text:span><text:span text:style-name="T29">memory of the swirly </text:span><text:span text:style-name="T33">and </text:span><text:soft-page-break/><text:span text:style-name="T33"><text:tab/></text:span><text:span text:style-name="T30">enveloping brouhaha of </text:span><text:span text:style-name="T33">such hope and wonder </text:span><text:span text:style-name="T28">I was <text:tab/>just in enraptured with.</text:span><text:span text:style-name="T30"> </text:span></text:p>
      <text:p text:style-name="P7"/>
      <text:p text:style-name="P13"><text:span text:style-name="T3">“This was the end of the dream,” I say quietly. “What I woke from just now: </text:span><text:span text:style-name="T34">those </text:span><text:span text:style-name="T3">clouds of swirling dust and everyone with whom I’d ever connected, and everyone else too, we were all in it together... </text:span><text:span text:style-name="T34">you were there with me too...”</text:span></text:p>
      <text:p text:style-name="P7"/>
      <text:p text:style-name="P12"><text:span text:style-name="T12">The fan hums. The dust swirls.</text:span></text:p>
      <text:p text:style-name="P7"/>
      <text:p text:style-name="P13"><text:span text:style-name="T3">“It was very peaceful… like your hand on my face waking me up just now. <text:s/></text:span><text:span text:style-name="T34">Welcoming me home</text:span><text:span text:style-name="T3">”</text:span></text:p>
      <text:p text:style-name="Standard"/>
      <text:h text:style-name="P11" text:outline-level="1"><text:span text:style-name="T8">Part Three: The Settling</text:span></text:h>
      <text:p text:style-name="P26"><text:span text:style-name="T12">The dust swirls. The fan hums.</text:span><text:span text:style-name="T12"/></text:p>
      <text:p text:style-name="P27"/>
      <text:p text:style-name="P27"><text:tab/>It is very peaceful in your luscious gaze, while we’re <text:tab/>naked and awake in Love and recovering from <text:s/><text:tab/>rapture.</text:p>
      <text:p text:style-name="P7"/>
      <text:p text:style-name="P13"><text:span text:style-name="T3">You turn off the fan. The dust keeps moving, keeps swirling while slowly losing its momentum and quietly settling back into the room’s corners where all good dust lives.</text:span></text:p>
      <text:p text:style-name="P7"/>
      <text:p text:style-name="P13"><text:span text:style-name="T3">You spark up a cigarette and sit back silently on the pseudo-sofa at the sliding doors. I watch you watch the settling dust. There’s something in your expression I can’t quite read—not sadness, not exactly. Something closer to recognition.</text:span></text:p>
      <text:p text:style-name="P7"/>
      <text:p text:style-name="P13"><text:span text:style-name="T3">“That must have been beautiful,” you say, finally. Fondly.</text:span></text:p>
      <text:p text:style-name="P7"/>
      <text:p text:style-name="P13"><text:span text:style-name="T3">“Yeah. Quite something. </text:span><text:span text:style-name="T35">It f</text:span><text:span text:style-name="T3">eels a little melancholy now, though.” I say, leaning into the feeling, “Perhaps it’s that I’m having cravings for it already. It was such </text:span><text:soft-page-break/><text:span text:style-name="T3">a prescient scene. Beautiful is almost </text:span><text:span text:style-name="T35">too </text:span><text:span text:style-name="T3">vague. I don’t know, Love. Yeah.”</text:span></text:p>
      <text:p text:style-name="P7"/>
      <text:p text:style-name="P13"><text:span text:style-name="T3">You don’t respond right away. You’re still watching the dust. It’s about settled now. A mess creeping back to its secret places.</text:span></text:p>
      <text:p text:style-name="P7"/>
      <text:p text:style-name="P13"><text:span text:style-name="T3">“Good dreaming,” you say.</text:span></text:p>
      <text:p text:style-name="P7"/>
      <text:p text:style-name="P13"><text:span text:style-name="T3">“So </text:span><text:span text:style-name="T29">g</text:span><text:span text:style-name="T3">ood waking up with you,” I say back, and I mean it with a weight that probably shows on my face:</text:span></text:p>
      <text:p text:style-name="P7"/>
      <text:p text:style-name="P13"><text:span text:style-name="T3">A</text:span><text:span text:style-name="T29">s</text:span><text:span text:style-name="T3"> I </text:span><text:span text:style-name="T29">struggle to place whether </text:span><text:span text:style-name="T3">this </text:span><text:span text:style-name="T29">dreamy </text:span><text:span text:style-name="T3">moment itself is </text:span><text:span text:style-name="T29">even </text:span><text:span text:style-name="T3">real…. Or </text:span><text:span text:style-name="T29">if </text:span><text:span text:style-name="T3">I just ma</text:span><text:span text:style-name="T29">d</text:span><text:span text:style-name="T3">e it all up so I could </text:span><text:span text:style-name="T29">somehow </text:span><text:span text:style-name="T3">tell you that I hope I will see you in my dreams </text:span><text:span text:style-name="T29">someday</text:span><text:span text:style-name="T3">.</text:span></text:p>
      <text:p text:style-name="P7"/>
      <text:p text:style-name="P28">You smile</text:p>
      <text:p text:style-name="P28"/>
      <text:p text:style-name="P28">—that particular smile that’s been haunting me since that late summer day <text:span text:style-name="T36">in the p</text:span>ark, <text:span text:style-name="T36">when</text:span> you had me draw a poem on your thigh. <text:s/>I was too young <text:span text:style-name="T37">and </text:span><text:s/><text:span text:style-name="T37">awestruck in Love with you. <text:s/>Much </text:span>too daft to understand what you were offering… What that kind <text:soft-page-break/>of vulnerability meant between people on their way to being Lovers, or not, <text:span text:style-name="T37">as it were.</text:span></text:p>
      <text:p text:style-name="P7"/>
      <text:p text:style-name="P29"><text:tab/>The piece:</text:p>
      <text:p text:style-name="P30"><text:span text:style-name="T12">I was a shooting star with dreams,</text:span></text:p>
      <text:p text:style-name="P30"><text:span text:style-name="T12">Burning up in atmosphere.</text:span></text:p>
      <text:p text:style-name="P30"><text:span text:style-name="T12">And now, from afar it seems</text:span></text:p>
      <text:p text:style-name="P30"><text:span text:style-name="T12">That I can see myself from here…</text:span></text:p>
      <text:p text:style-name="P7"/>
      <text:p text:style-name="P13"><text:span text:style-name="T34">Dripping with an </text:span><text:span text:style-name="T3">irony </text:span><text:span text:style-name="T34">that </text:span><text:span text:style-name="T3">still stings </text:span><text:span text:style-name="T34">enough </text:span><text:span text:style-name="T3">to this day </text:span><text:span text:style-name="T34">so as to p</text:span><text:span text:style-name="T3">opulate </text:span><text:span text:style-name="T34">such a dream as</text:span><text:span text:style-name="T3"> this...</text:span></text:p>
      <text:p text:style-name="P7"/>
      <text:p text:style-name="P13"><text:span text:style-name="T3">—</text:span><text:span text:style-name="T34">a</text:span><text:span text:style-name="T3">s you spring from the heater onto the bed, into your </text:span><text:span text:style-name="T33">rush-ready </text:span><text:span text:style-name="T3">robe, then right out the door with a thumbs up. No words, just a giggle.</text:span></text:p>
      <text:p text:style-name="P7"/>
      <text:p text:style-name="P31"><text:span text:style-name="T3">And I’m naked and alone.</text:span></text:p>
      <text:p text:style-name="P7"/>
      <text:p text:style-name="P13"><text:span text:style-name="T3">I sit by the window for a wee while longer, </text:span><text:span text:style-name="T33">this morning. <text:s/>W</text:span><text:span text:style-name="T3">atching the last lingering dust motes catch the </text:span><text:span text:style-name="T33">warming </text:span><text:span text:style-name="T3">light </text:span><text:span text:style-name="T33">and I’m </text:span><text:span text:style-name="T3">thinking.</text:span></text:p>
      <text:p text:style-name="P7"/>
      <text:p text:style-name="P32"><text:span text:style-name="T3">Thinking about </text:span><text:span text:style-name="T33">that time in </text:span><text:span text:style-name="T3">Central Park </text:span><text:span text:style-name="T38">with only </text:span><text:span text:style-name="T3">forty-nine minutes to go</text:span><text:span text:style-name="T34">; </text:span><text:span text:style-name="T3">about how we’re all walking </text:span><text:soft-page-break/><text:span text:style-name="T3">around with a future of apocalypse dust on our skin and calling it just another Tuesday.</text:span></text:p>
      <text:p text:style-name="P7"/>
      <text:p text:style-name="P13"><text:span text:style-name="T3">Because it’s been forever </text:span><text:span text:style-name="T34">since th</text:span><text:span text:style-name="T33">at dream </text:span><text:span text:style-name="T3">and you’re the only one I ever wanted to share </text:span><text:span text:style-name="T33">it </text:span><text:span text:style-name="T3">with. I ache at how it breaks something in me that I never did, every single time </text:span><text:span text:style-name="T35">I think of you..</text:span><text:span text:style-name="T3">.</text:span></text:p>
      <text:p text:style-name="P7"/>
      <text:p text:style-name="P13"><text:span text:style-name="T3">...And </text:span><text:span text:style-name="T39">that </text:span><text:span text:style-name="T35">all </text:span><text:span text:style-name="T3">I can </text:span><text:span text:style-name="T40">do is</text:span><text:span text:style-name="T3"> dream, </text:span><text:span text:style-name="T39">that we’re naked and </text:span><text:span text:style-name="T41">that </text:span><text:span text:style-name="T39">I’ve got </text:span><text:span text:style-name="T35">this </text:span><text:span text:style-name="T33">mess in the pad and a </text:span><text:span text:style-name="T3">coffee and a full day with you on the way.</text:span></text:p>
      <text:p text:style-name="P7"/>
      <text:p text:style-name="P5"><text:span text:style-name="T42">∞</text:span></text:p>
      <text:p text:style-name="Standard"/>
      <text:p text:style-name="P33"/>
      <text:p text:style-name="P5"><text:span text:style-name="T43">About the Author</text:span></text:p>
      <text:p text:style-name="P7"/>
      <text:p text:style-name="P12"><text:span text:style-name="T3">ChefMyKLove is a writer, creative polymath, and former soap kitchen operator based on Vancouver Island, BC. We’re Naked! is his debut published fiction.</text:span></text:p>
      <text:p text:style-name="P4"/>
      <text:p text:style-name="P2"><text:span text:style-name="T3">—</text:span></text:p>
      <text:p text:style-name="P7"/>
      <text:p text:style-name="P5"><text:span text:style-name="T44">We’re Naked! — Numbered Edition</text:span></text:p>
      <text:p text:style-name="P3"/>
      <text:p text:style-name="P12"><text:span text:style-name="T35">100</text:span><text:span text:style-name="T3"> numbered copies exist. Each includes a signed certificate of authenticity, full-resolution cover art, and a personal note from the author. Never reprinted.</text:span></text:p>
      <text:p text:style-name="P3"/>
      <text:p text:style-name="P5"><text:span text:style-name="T7">chefmyklove.com/naked</text:span></text:p>
      <text:p text:style-name="P4"/>
      <text:p text:style-name="P5"><text:span text:style-name="T45">Next from ChefMyKLove:</text:span></text:p>
      <text:p text:style-name="P3"/>
      <text:p text:style-name="P5"><text:span text:style-name="T46">Spectral Que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aramond" svg:font-family="Garamond" style:font-family-generic="roman" style:font-pitch="variable"/>
    <style:font-face style:name="Garamond1" svg:font-family="Garamond" style:font-family-generic="swiss" style:font-pitch="variable"/>
    <style:font-face style:name="Garamond2" svg:font-family="Garamond"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aramond" fo:font-size="12pt" fo:language="en" fo:country="CA" style:letter-kerning="false" style:font-name-asian="Garamond2" style:font-size-asian="12pt" style:language-asian="zh" style:country-asian="CN" style:font-name-complex="Garamond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Garamond" fo:font-size="12pt" fo:language="en" fo:country="CA" style:letter-kerning="false" style:font-name-asian="Garamond2" style:font-size-asian="12pt" style:language-asian="zh" style:country-asian="CN" style:font-name-complex="Garamond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847cm" fo:margin-bottom="0.847cm" style:contextual-spacing="false"/>
      <style:text-properties style:font-name="Garamond1" fo:font-family="Garamond" style:font-family-generic="swiss" style:font-pitch="variable" fo:font-size="16pt" fo:font-weight="bold" style:font-name-asian="Garamond2" style:font-family-asian="Garamond" style:font-family-generic-asian="system" style:font-pitch-asian="variable" style:font-size-asian="16pt" style:font-weight-asian="bold" style:font-name-complex="Garamond2" style:font-family-complex="Garamond" style:font-family-generic-complex="system" style:font-pitch-complex="variable" style:font-size-complex="16pt" style:font-weight-complex="bold"/>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24cm" fo:page-height="24.13cm" style:num-format="1" style:print-orientation="portrait" fo:margin-top="2.54cm" fo:margin-bottom="2.54cm" fo:margin-left="2.54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0</meta:editing-cycles>
    <meta:creation-date>2026-05-03T16:30:56.070000000</meta:creation-date>
    <dc:date>2026-05-04T19:45:07.597496800</dc:date>
    <meta:editing-duration>P1DT1H58M32S</meta:editing-duration>
    <meta:generator>LibreOffice/25.8.5.2$Windows_X86_64 LibreOffice_project/9c8b85f387cc00a89945a79c9e6239f32e450ac2</meta:generator>
    <meta:document-statistic meta:table-count="0" meta:image-count="0" meta:object-count="0" meta:page-count="22" meta:paragraph-count="129" meta:word-count="2585" meta:character-count="14161" meta:non-whitespace-character-count="11677"/>
  </office:meta>
</office:document-meta>
</file>